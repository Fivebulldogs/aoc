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shapes>
          <draw:frame draw:z-index="0" draw:style-name="gr1" draw:text-style-name="P1" svg:width="22.1469in" svg:height="12.4575in" svg:x="4.9268in" svg:y="0.698in">
            <draw:object draw:notify-on-update-of-ranges="input.A1:input.A496 input.B1:input.B4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8021" calcext:value-type="float">
            <text:p>98021</text:p>
          </table:table-cell>
          <table:table-cell office:value-type="float" office:value="50083" calcext:value-type="float">
            <text:p>50083</text:p>
          </table:table-cell>
        </table:table-row>
        <table:table-row table:style-name="ro1">
          <table:table-cell office:value-type="float" office:value="98021" calcext:value-type="float">
            <text:p>98021</text:p>
          </table:table-cell>
          <table:table-cell office:value-type="float" office:value="51293" calcext:value-type="float">
            <text:p>51293</text:p>
          </table:table-cell>
        </table:table-row>
        <table:table-row table:style-name="ro1">
          <table:table-cell office:value-type="float" office:value="97775" calcext:value-type="float">
            <text:p>97775</text:p>
          </table:table-cell>
          <table:table-cell office:value-type="float" office:value="51293" calcext:value-type="float">
            <text:p>51293</text:p>
          </table:table-cell>
        </table:table-row>
        <table:table-row table:style-name="ro1">
          <table:table-cell office:value-type="float" office:value="97775" calcext:value-type="float">
            <text:p>97775</text:p>
          </table:table-cell>
          <table:table-cell office:value-type="float" office:value="52518" calcext:value-type="float">
            <text:p>52518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52518" calcext:value-type="float">
            <text:p>52518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53742" calcext:value-type="float">
            <text:p>53742</text:p>
          </table:table-cell>
        </table:table-row>
        <table:table-row table:style-name="ro1">
          <table:table-cell office:value-type="float" office:value="98035" calcext:value-type="float">
            <text:p>98035</text:p>
          </table:table-cell>
          <table:table-cell office:value-type="float" office:value="53742" calcext:value-type="float">
            <text:p>53742</text:p>
          </table:table-cell>
        </table:table-row>
        <table:table-row table:style-name="ro1">
          <table:table-cell office:value-type="float" office:value="98035" calcext:value-type="float">
            <text:p>98035</text:p>
          </table:table-cell>
          <table:table-cell office:value-type="float" office:value="54940" calcext:value-type="float">
            <text:p>54940</text:p>
          </table:table-cell>
        </table:table-row>
        <table:table-row table:style-name="ro1">
          <table:table-cell office:value-type="float" office:value="97760" calcext:value-type="float">
            <text:p>97760</text:p>
          </table:table-cell>
          <table:table-cell office:value-type="float" office:value="54940" calcext:value-type="float">
            <text:p>54940</text:p>
          </table:table-cell>
        </table:table-row>
        <table:table-row table:style-name="ro1">
          <table:table-cell office:value-type="float" office:value="97760" calcext:value-type="float">
            <text:p>97760</text:p>
          </table:table-cell>
          <table:table-cell office:value-type="float" office:value="56150" calcext:value-type="float">
            <text:p>56150</text:p>
          </table:table-cell>
        </table:table-row>
        <table:table-row table:style-name="ro1">
          <table:table-cell office:value-type="float" office:value="97628" calcext:value-type="float">
            <text:p>97628</text:p>
          </table:table-cell>
          <table:table-cell office:value-type="float" office:value="56150" calcext:value-type="float">
            <text:p>56150</text:p>
          </table:table-cell>
        </table:table-row>
        <table:table-row table:style-name="ro1">
          <table:table-cell office:value-type="float" office:value="97628" calcext:value-type="float">
            <text:p>97628</text:p>
          </table:table-cell>
          <table:table-cell office:value-type="float" office:value="57360" calcext:value-type="float">
            <text:p>57360</text:p>
          </table:table-cell>
        </table:table-row>
        <table:table-row table:style-name="ro1">
          <table:table-cell office:value-type="float" office:value="97495" calcext:value-type="float">
            <text:p>97495</text:p>
          </table:table-cell>
          <table:table-cell office:value-type="float" office:value="57360" calcext:value-type="float">
            <text:p>57360</text:p>
          </table:table-cell>
        </table:table-row>
        <table:table-row table:style-name="ro1">
          <table:table-cell office:value-type="float" office:value="97495" calcext:value-type="float">
            <text:p>97495</text:p>
          </table:table-cell>
          <table:table-cell office:value-type="float" office:value="58566" calcext:value-type="float">
            <text:p>58566</text:p>
          </table:table-cell>
        </table:table-row>
        <table:table-row table:style-name="ro1">
          <table:table-cell office:value-type="float" office:value="97321" calcext:value-type="float">
            <text:p>97321</text:p>
          </table:table-cell>
          <table:table-cell office:value-type="float" office:value="58566" calcext:value-type="float">
            <text:p>58566</text:p>
          </table:table-cell>
        </table:table-row>
        <table:table-row table:style-name="ro1">
          <table:table-cell office:value-type="float" office:value="97321" calcext:value-type="float">
            <text:p>97321</text:p>
          </table:table-cell>
          <table:table-cell office:value-type="float" office:value="59684" calcext:value-type="float">
            <text:p>59684</text:p>
          </table:table-cell>
        </table:table-row>
        <table:table-row table:style-name="ro1">
          <table:table-cell office:value-type="float" office:value="96713" calcext:value-type="float">
            <text:p>96713</text:p>
          </table:table-cell>
          <table:table-cell office:value-type="float" office:value="59684" calcext:value-type="float">
            <text:p>59684</text:p>
          </table:table-cell>
        </table:table-row>
        <table:table-row table:style-name="ro1">
          <table:table-cell office:value-type="float" office:value="96713" calcext:value-type="float">
            <text:p>96713</text:p>
          </table:table-cell>
          <table:table-cell office:value-type="float" office:value="60854" calcext:value-type="float">
            <text:p>60854</text:p>
          </table:table-cell>
        </table:table-row>
        <table:table-row table:style-name="ro1">
          <table:table-cell office:value-type="float" office:value="96409" calcext:value-type="float">
            <text:p>96409</text:p>
          </table:table-cell>
          <table:table-cell office:value-type="float" office:value="60854" calcext:value-type="float">
            <text:p>60854</text:p>
          </table:table-cell>
        </table:table-row>
        <table:table-row table:style-name="ro1">
          <table:table-cell office:value-type="float" office:value="96409" calcext:value-type="float">
            <text:p>96409</text:p>
          </table:table-cell>
          <table:table-cell office:value-type="float" office:value="62203" calcext:value-type="float">
            <text:p>62203</text:p>
          </table:table-cell>
        </table:table-row>
        <table:table-row table:style-name="ro1">
          <table:table-cell office:value-type="float" office:value="96796" calcext:value-type="float">
            <text:p>96796</text:p>
          </table:table-cell>
          <table:table-cell office:value-type="float" office:value="62203" calcext:value-type="float">
            <text:p>62203</text:p>
          </table:table-cell>
        </table:table-row>
        <table:table-row table:style-name="ro1">
          <table:table-cell office:value-type="float" office:value="96796" calcext:value-type="float">
            <text:p>96796</text:p>
          </table:table-cell>
          <table:table-cell office:value-type="float" office:value="63392" calcext:value-type="float">
            <text:p>63392</text:p>
          </table:table-cell>
        </table:table-row>
        <table:table-row table:style-name="ro1">
          <table:table-cell office:value-type="float" office:value="96497" calcext:value-type="float">
            <text:p>96497</text:p>
          </table:table-cell>
          <table:table-cell office:value-type="float" office:value="63392" calcext:value-type="float">
            <text:p>63392</text:p>
          </table:table-cell>
        </table:table-row>
        <table:table-row table:style-name="ro1">
          <table:table-cell office:value-type="float" office:value="96497" calcext:value-type="float">
            <text:p>96497</text:p>
          </table:table-cell>
          <table:table-cell office:value-type="float" office:value="64308" calcext:value-type="float">
            <text:p>64308</text:p>
          </table:table-cell>
        </table:table-row>
        <table:table-row table:style-name="ro1">
          <table:table-cell office:value-type="float" office:value="95329" calcext:value-type="float">
            <text:p>95329</text:p>
          </table:table-cell>
          <table:table-cell office:value-type="float" office:value="64308" calcext:value-type="float">
            <text:p>64308</text:p>
          </table:table-cell>
        </table:table-row>
        <table:table-row table:style-name="ro1">
          <table:table-cell office:value-type="float" office:value="95329" calcext:value-type="float">
            <text:p>95329</text:p>
          </table:table-cell>
          <table:table-cell office:value-type="float" office:value="65512" calcext:value-type="float">
            <text:p>65512</text:p>
          </table:table-cell>
        </table:table-row>
        <table:table-row table:style-name="ro1">
          <table:table-cell office:value-type="float" office:value="95127" calcext:value-type="float">
            <text:p>95127</text:p>
          </table:table-cell>
          <table:table-cell office:value-type="float" office:value="65512" calcext:value-type="float">
            <text:p>65512</text:p>
          </table:table-cell>
        </table:table-row>
        <table:table-row table:style-name="ro1">
          <table:table-cell office:value-type="float" office:value="95127" calcext:value-type="float">
            <text:p>95127</text:p>
          </table:table-cell>
          <table:table-cell office:value-type="float" office:value="66767" calcext:value-type="float">
            <text:p>66767</text:p>
          </table:table-cell>
        </table:table-row>
        <table:table-row table:style-name="ro1">
          <table:table-cell office:value-type="float" office:value="95034" calcext:value-type="float">
            <text:p>95034</text:p>
          </table:table-cell>
          <table:table-cell office:value-type="float" office:value="66767" calcext:value-type="float">
            <text:p>66767</text:p>
          </table:table-cell>
        </table:table-row>
        <table:table-row table:style-name="ro1">
          <table:table-cell office:value-type="float" office:value="95034" calcext:value-type="float">
            <text:p>95034</text:p>
          </table:table-cell>
          <table:table-cell office:value-type="float" office:value="67767" calcext:value-type="float">
            <text:p>67767</text:p>
          </table:table-cell>
        </table:table-row>
        <table:table-row table:style-name="ro1">
          <table:table-cell office:value-type="float" office:value="94256" calcext:value-type="float">
            <text:p>94256</text:p>
          </table:table-cell>
          <table:table-cell office:value-type="float" office:value="67767" calcext:value-type="float">
            <text:p>67767</text:p>
          </table:table-cell>
        </table:table-row>
        <table:table-row table:style-name="ro1">
          <table:table-cell office:value-type="float" office:value="94256" calcext:value-type="float">
            <text:p>94256</text:p>
          </table:table-cell>
          <table:table-cell office:value-type="float" office:value="69124" calcext:value-type="float">
            <text:p>69124</text:p>
          </table:table-cell>
        </table:table-row>
        <table:table-row table:style-name="ro1">
          <table:table-cell office:value-type="float" office:value="94351" calcext:value-type="float">
            <text:p>94351</text:p>
          </table:table-cell>
          <table:table-cell office:value-type="float" office:value="69124" calcext:value-type="float">
            <text:p>69124</text:p>
          </table:table-cell>
        </table:table-row>
        <table:table-row table:style-name="ro1">
          <table:table-cell office:value-type="float" office:value="94351" calcext:value-type="float">
            <text:p>94351</text:p>
          </table:table-cell>
          <table:table-cell office:value-type="float" office:value="69962" calcext:value-type="float">
            <text:p>69962</text:p>
          </table:table-cell>
        </table:table-row>
        <table:table-row table:style-name="ro1">
          <table:table-cell office:value-type="float" office:value="93248" calcext:value-type="float">
            <text:p>93248</text:p>
          </table:table-cell>
          <table:table-cell office:value-type="float" office:value="69962" calcext:value-type="float">
            <text:p>69962</text:p>
          </table:table-cell>
        </table:table-row>
        <table:table-row table:style-name="ro1">
          <table:table-cell office:value-type="float" office:value="93248" calcext:value-type="float">
            <text:p>93248</text:p>
          </table:table-cell>
          <table:table-cell office:value-type="float" office:value="71338" calcext:value-type="float">
            <text:p>71338</text:p>
          </table:table-cell>
        </table:table-row>
        <table:table-row table:style-name="ro1">
          <table:table-cell office:value-type="float" office:value="93310" calcext:value-type="float">
            <text:p>93310</text:p>
          </table:table-cell>
          <table:table-cell office:value-type="float" office:value="71338" calcext:value-type="float">
            <text:p>71338</text:p>
          </table:table-cell>
        </table:table-row>
        <table:table-row table:style-name="ro1">
          <table:table-cell office:value-type="float" office:value="93310" calcext:value-type="float">
            <text:p>93310</text:p>
          </table:table-cell>
          <table:table-cell office:value-type="float" office:value="72279" calcext:value-type="float">
            <text:p>72279</text:p>
          </table:table-cell>
        </table:table-row>
        <table:table-row table:style-name="ro1">
          <table:table-cell office:value-type="float" office:value="92470" calcext:value-type="float">
            <text:p>92470</text:p>
          </table:table-cell>
          <table:table-cell office:value-type="float" office:value="72279" calcext:value-type="float">
            <text:p>72279</text:p>
          </table:table-cell>
        </table:table-row>
        <table:table-row table:style-name="ro1">
          <table:table-cell office:value-type="float" office:value="92470" calcext:value-type="float">
            <text:p>92470</text:p>
          </table:table-cell>
          <table:table-cell office:value-type="float" office:value="73224" calcext:value-type="float">
            <text:p>73224</text:p>
          </table:table-cell>
        </table:table-row>
        <table:table-row table:style-name="ro1">
          <table:table-cell office:value-type="float" office:value="91671" calcext:value-type="float">
            <text:p>91671</text:p>
          </table:table-cell>
          <table:table-cell office:value-type="float" office:value="73224" calcext:value-type="float">
            <text:p>73224</text:p>
          </table:table-cell>
        </table:table-row>
        <table:table-row table:style-name="ro1">
          <table:table-cell office:value-type="float" office:value="91671" calcext:value-type="float">
            <text:p>91671</text:p>
          </table:table-cell>
          <table:table-cell office:value-type="float" office:value="74468" calcext:value-type="float">
            <text:p>74468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74468" calcext:value-type="float">
            <text:p>74468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75616" calcext:value-type="float">
            <text:p>75616</text:p>
          </table:table-cell>
        </table:table-row>
        <table:table-row table:style-name="ro1">
          <table:table-cell office:value-type="float" office:value="90939" calcext:value-type="float">
            <text:p>90939</text:p>
          </table:table-cell>
          <table:table-cell office:value-type="float" office:value="75616" calcext:value-type="float">
            <text:p>75616</text:p>
          </table:table-cell>
        </table:table-row>
        <table:table-row table:style-name="ro1">
          <table:table-cell office:value-type="float" office:value="90939" calcext:value-type="float">
            <text:p>90939</text:p>
          </table:table-cell>
          <table:table-cell office:value-type="float" office:value="76644" calcext:value-type="float">
            <text:p>76644</text:p>
          </table:table-cell>
        </table:table-row>
        <table:table-row table:style-name="ro1">
          <table:table-cell office:value-type="float" office:value="90276" calcext:value-type="float">
            <text:p>90276</text:p>
          </table:table-cell>
          <table:table-cell office:value-type="float" office:value="76644" calcext:value-type="float">
            <text:p>76644</text:p>
          </table:table-cell>
        </table:table-row>
        <table:table-row table:style-name="ro1">
          <table:table-cell office:value-type="float" office:value="90276" calcext:value-type="float">
            <text:p>90276</text:p>
          </table:table-cell>
          <table:table-cell office:value-type="float" office:value="77311" calcext:value-type="float">
            <text:p>77311</text:p>
          </table:table-cell>
        </table:table-row>
        <table:table-row table:style-name="ro1">
          <table:table-cell office:value-type="float" office:value="89094" calcext:value-type="float">
            <text:p>89094</text:p>
          </table:table-cell>
          <table:table-cell office:value-type="float" office:value="77311" calcext:value-type="float">
            <text:p>77311</text:p>
          </table:table-cell>
        </table:table-row>
        <table:table-row table:style-name="ro1">
          <table:table-cell office:value-type="float" office:value="89094" calcext:value-type="float">
            <text:p>89094</text:p>
          </table:table-cell>
          <table:table-cell office:value-type="float" office:value="78582" calcext:value-type="float">
            <text:p>78582</text:p>
          </table:table-cell>
        </table:table-row>
        <table:table-row table:style-name="ro1">
          <table:table-cell office:value-type="float" office:value="88781" calcext:value-type="float">
            <text:p>88781</text:p>
          </table:table-cell>
          <table:table-cell office:value-type="float" office:value="78582" calcext:value-type="float">
            <text:p>78582</text:p>
          </table:table-cell>
        </table:table-row>
        <table:table-row table:style-name="ro1">
          <table:table-cell office:value-type="float" office:value="88781" calcext:value-type="float">
            <text:p>88781</text:p>
          </table:table-cell>
          <table:table-cell office:value-type="float" office:value="79337" calcext:value-type="float">
            <text:p>79337</text:p>
          </table:table-cell>
        </table:table-row>
        <table:table-row table:style-name="ro1">
          <table:table-cell office:value-type="float" office:value="87764" calcext:value-type="float">
            <text:p>87764</text:p>
          </table:table-cell>
          <table:table-cell office:value-type="float" office:value="79337" calcext:value-type="float">
            <text:p>79337</text:p>
          </table:table-cell>
        </table:table-row>
        <table:table-row table:style-name="ro1">
          <table:table-cell office:value-type="float" office:value="87764" calcext:value-type="float">
            <text:p>87764</text:p>
          </table:table-cell>
          <table:table-cell office:value-type="float" office:value="80182" calcext:value-type="float">
            <text:p>80182</text:p>
          </table:table-cell>
        </table:table-row>
        <table:table-row table:style-name="ro1">
          <table:table-cell office:value-type="float" office:value="86884" calcext:value-type="float">
            <text:p>86884</text:p>
          </table:table-cell>
          <table:table-cell office:value-type="float" office:value="80182" calcext:value-type="float">
            <text:p>80182</text:p>
          </table:table-cell>
        </table:table-row>
        <table:table-row table:style-name="ro1">
          <table:table-cell office:value-type="float" office:value="86884" calcext:value-type="float">
            <text:p>86884</text:p>
          </table:table-cell>
          <table:table-cell office:value-type="float" office:value="81425" calcext:value-type="float">
            <text:p>81425</text:p>
          </table:table-cell>
        </table:table-row>
        <table:table-row table:style-name="ro1">
          <table:table-cell office:value-type="float" office:value="86477" calcext:value-type="float">
            <text:p>86477</text:p>
          </table:table-cell>
          <table:table-cell office:value-type="float" office:value="81425" calcext:value-type="float">
            <text:p>81425</text:p>
          </table:table-cell>
        </table:table-row>
        <table:table-row table:style-name="ro1">
          <table:table-cell office:value-type="float" office:value="86477" calcext:value-type="float">
            <text:p>86477</text:p>
          </table:table-cell>
          <table:table-cell office:value-type="float" office:value="82392" calcext:value-type="float">
            <text:p>82392</text:p>
          </table:table-cell>
        </table:table-row>
        <table:table-row table:style-name="ro1">
          <table:table-cell office:value-type="float" office:value="85728" calcext:value-type="float">
            <text:p>85728</text:p>
          </table:table-cell>
          <table:table-cell office:value-type="float" office:value="82392" calcext:value-type="float">
            <text:p>82392</text:p>
          </table:table-cell>
        </table:table-row>
        <table:table-row table:style-name="ro1">
          <table:table-cell office:value-type="float" office:value="85728" calcext:value-type="float">
            <text:p>85728</text:p>
          </table:table-cell>
          <table:table-cell office:value-type="float" office:value="83140" calcext:value-type="float">
            <text:p>83140</text:p>
          </table:table-cell>
        </table:table-row>
        <table:table-row table:style-name="ro1">
          <table:table-cell office:value-type="float" office:value="84742" calcext:value-type="float">
            <text:p>84742</text:p>
          </table:table-cell>
          <table:table-cell office:value-type="float" office:value="83140" calcext:value-type="float">
            <text:p>83140</text:p>
          </table:table-cell>
        </table:table-row>
        <table:table-row table:style-name="ro1">
          <table:table-cell office:value-type="float" office:value="84742" calcext:value-type="float">
            <text:p>84742</text:p>
          </table:table-cell>
          <table:table-cell office:value-type="float" office:value="83749" calcext:value-type="float">
            <text:p>83749</text:p>
          </table:table-cell>
        </table:table-row>
        <table:table-row table:style-name="ro1">
          <table:table-cell office:value-type="float" office:value="83632" calcext:value-type="float">
            <text:p>83632</text:p>
          </table:table-cell>
          <table:table-cell office:value-type="float" office:value="83749" calcext:value-type="float">
            <text:p>83749</text:p>
          </table:table-cell>
        </table:table-row>
        <table:table-row table:style-name="ro1">
          <table:table-cell office:value-type="float" office:value="83632" calcext:value-type="float">
            <text:p>83632</text:p>
          </table:table-cell>
          <table:table-cell office:value-type="float" office:value="85195" calcext:value-type="float">
            <text:p>85195</text:p>
          </table:table-cell>
        </table:table-row>
        <table:table-row table:style-name="ro1">
          <table:table-cell office:value-type="float" office:value="83339" calcext:value-type="float">
            <text:p>83339</text:p>
          </table:table-cell>
          <table:table-cell office:value-type="float" office:value="85195" calcext:value-type="float">
            <text:p>85195</text:p>
          </table:table-cell>
        </table:table-row>
        <table:table-row table:style-name="ro1">
          <table:table-cell office:value-type="float" office:value="83339" calcext:value-type="float">
            <text:p>83339</text:p>
          </table:table-cell>
          <table:table-cell office:value-type="float" office:value="85864" calcext:value-type="float">
            <text:p>85864</text:p>
          </table:table-cell>
        </table:table-row>
        <table:table-row table:style-name="ro1">
          <table:table-cell office:value-type="float" office:value="82288" calcext:value-type="float">
            <text:p>82288</text:p>
          </table:table-cell>
          <table:table-cell office:value-type="float" office:value="85864" calcext:value-type="float">
            <text:p>85864</text:p>
          </table:table-cell>
        </table:table-row>
        <table:table-row table:style-name="ro1">
          <table:table-cell office:value-type="float" office:value="82288" calcext:value-type="float">
            <text:p>82288</text:p>
          </table:table-cell>
          <table:table-cell office:value-type="float" office:value="86834" calcext:value-type="float">
            <text:p>86834</text:p>
          </table:table-cell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86834" calcext:value-type="float">
            <text:p>86834</text:p>
          </table:table-cell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87592" calcext:value-type="float">
            <text:p>87592</text:p>
          </table:table-cell>
        </table:table-row>
        <table:table-row table:style-name="ro1">
          <table:table-cell office:value-type="float" office:value="80543" calcext:value-type="float">
            <text:p>80543</text:p>
          </table:table-cell>
          <table:table-cell office:value-type="float" office:value="87592" calcext:value-type="float">
            <text:p>87592</text:p>
          </table:table-cell>
        </table:table-row>
        <table:table-row table:style-name="ro1">
          <table:table-cell office:value-type="float" office:value="80543" calcext:value-type="float">
            <text:p>80543</text:p>
          </table:table-cell>
          <table:table-cell office:value-type="float" office:value="87695" calcext:value-type="float">
            <text:p>87695</text:p>
          </table:table-cell>
        </table:table-row>
        <table:table-row table:style-name="ro1">
          <table:table-cell office:value-type="float" office:value="79073" calcext:value-type="float">
            <text:p>79073</text:p>
          </table:table-cell>
          <table:table-cell office:value-type="float" office:value="87695" calcext:value-type="float">
            <text:p>87695</text:p>
          </table:table-cell>
        </table:table-row>
        <table:table-row table:style-name="ro1">
          <table:table-cell office:value-type="float" office:value="79073" calcext:value-type="float">
            <text:p>79073</text:p>
          </table:table-cell>
          <table:table-cell office:value-type="float" office:value="88845" calcext:value-type="float">
            <text:p>88845</text:p>
          </table:table-cell>
        </table:table-row>
        <table:table-row table:style-name="ro1">
          <table:table-cell office:value-type="float" office:value="78420" calcext:value-type="float">
            <text:p>78420</text:p>
          </table:table-cell>
          <table:table-cell office:value-type="float" office:value="88845" calcext:value-type="float">
            <text:p>88845</text:p>
          </table:table-cell>
        </table:table-row>
        <table:table-row table:style-name="ro1">
          <table:table-cell office:value-type="float" office:value="78420" calcext:value-type="float">
            <text:p>78420</text:p>
          </table:table-cell>
          <table:table-cell office:value-type="float" office:value="89119" calcext:value-type="float">
            <text:p>89119</text:p>
          </table:table-cell>
        </table:table-row>
        <table:table-row table:style-name="ro1">
          <table:table-cell office:value-type="float" office:value="77127" calcext:value-type="float">
            <text:p>77127</text:p>
          </table:table-cell>
          <table:table-cell office:value-type="float" office:value="89119" calcext:value-type="float">
            <text:p>89119</text:p>
          </table:table-cell>
        </table:table-row>
        <table:table-row table:style-name="ro1">
          <table:table-cell office:value-type="float" office:value="77127" calcext:value-type="float">
            <text:p>77127</text:p>
          </table:table-cell>
          <table:table-cell office:value-type="float" office:value="90384" calcext:value-type="float">
            <text:p>90384</text:p>
          </table:table-cell>
        </table:table-row>
        <table:table-row table:style-name="ro1">
          <table:table-cell office:value-type="float" office:value="76514" calcext:value-type="float">
            <text:p>76514</text:p>
          </table:table-cell>
          <table:table-cell office:value-type="float" office:value="90384" calcext:value-type="float">
            <text:p>90384</text:p>
          </table:table-cell>
        </table:table-row>
        <table:table-row table:style-name="ro1">
          <table:table-cell office:value-type="float" office:value="76514" calcext:value-type="float">
            <text:p>76514</text:p>
          </table:table-cell>
          <table:table-cell office:value-type="float" office:value="90398" calcext:value-type="float">
            <text:p>90398</text:p>
          </table:table-cell>
        </table:table-row>
        <table:table-row table:style-name="ro1">
          <table:table-cell office:value-type="float" office:value="75083" calcext:value-type="float">
            <text:p>75083</text:p>
          </table:table-cell>
          <table:table-cell office:value-type="float" office:value="90398" calcext:value-type="float">
            <text:p>90398</text:p>
          </table:table-cell>
        </table:table-row>
        <table:table-row table:style-name="ro1">
          <table:table-cell office:value-type="float" office:value="75083" calcext:value-type="float">
            <text:p>75083</text:p>
          </table:table-cell>
          <table:table-cell office:value-type="float" office:value="91469" calcext:value-type="float">
            <text:p>91469</text:p>
          </table:table-cell>
        </table:table-row>
        <table:table-row table:style-name="ro1">
          <table:table-cell office:value-type="float" office:value="74314" calcext:value-type="float">
            <text:p>74314</text:p>
          </table:table-cell>
          <table:table-cell office:value-type="float" office:value="91469" calcext:value-type="float">
            <text:p>91469</text:p>
          </table:table-cell>
        </table:table-row>
        <table:table-row table:style-name="ro1">
          <table:table-cell office:value-type="float" office:value="74314" calcext:value-type="float">
            <text:p>74314</text:p>
          </table:table-cell>
          <table:table-cell office:value-type="float" office:value="92401" calcext:value-type="float">
            <text:p>92401</text:p>
          </table:table-cell>
        </table:table-row>
        <table:table-row table:style-name="ro1">
          <table:table-cell office:value-type="float" office:value="73438" calcext:value-type="float">
            <text:p>73438</text:p>
          </table:table-cell>
          <table:table-cell office:value-type="float" office:value="92401" calcext:value-type="float">
            <text:p>92401</text:p>
          </table:table-cell>
        </table:table-row>
        <table:table-row table:style-name="ro1">
          <table:table-cell office:value-type="float" office:value="73438" calcext:value-type="float">
            <text:p>73438</text:p>
          </table:table-cell>
          <table:table-cell office:value-type="float" office:value="92259" calcext:value-type="float">
            <text:p>92259</text:p>
          </table:table-cell>
        </table:table-row>
        <table:table-row table:style-name="ro1">
          <table:table-cell office:value-type="float" office:value="71980" calcext:value-type="float">
            <text:p>71980</text:p>
          </table:table-cell>
          <table:table-cell office:value-type="float" office:value="92259" calcext:value-type="float">
            <text:p>92259</text:p>
          </table:table-cell>
        </table:table-row>
        <table:table-row table:style-name="ro1">
          <table:table-cell office:value-type="float" office:value="71980" calcext:value-type="float">
            <text:p>71980</text:p>
          </table:table-cell>
          <table:table-cell office:value-type="float" office:value="93015" calcext:value-type="float">
            <text:p>93015</text:p>
          </table:table-cell>
        </table:table-row>
        <table:table-row table:style-name="ro1">
          <table:table-cell office:value-type="float" office:value="71007" calcext:value-type="float">
            <text:p>71007</text:p>
          </table:table-cell>
          <table:table-cell office:value-type="float" office:value="93015" calcext:value-type="float">
            <text:p>93015</text:p>
          </table:table-cell>
        </table:table-row>
        <table:table-row table:style-name="ro1">
          <table:table-cell office:value-type="float" office:value="71007" calcext:value-type="float">
            <text:p>71007</text:p>
          </table:table-cell>
          <table:table-cell office:value-type="float" office:value="93573" calcext:value-type="float">
            <text:p>93573</text:p>
          </table:table-cell>
        </table:table-row>
        <table:table-row table:style-name="ro1">
          <table:table-cell office:value-type="float" office:value="69929" calcext:value-type="float">
            <text:p>69929</text:p>
          </table:table-cell>
          <table:table-cell office:value-type="float" office:value="93573" calcext:value-type="float">
            <text:p>93573</text:p>
          </table:table-cell>
        </table:table-row>
        <table:table-row table:style-name="ro1">
          <table:table-cell office:value-type="float" office:value="69929" calcext:value-type="float">
            <text:p>69929</text:p>
          </table:table-cell>
          <table:table-cell office:value-type="float" office:value="94069" calcext:value-type="float">
            <text:p>94069</text:p>
          </table:table-cell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float" office:value="94069" calcext:value-type="float">
            <text:p>94069</text:p>
          </table:table-cell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float" office:value="67686" calcext:value-type="float">
            <text:p>67686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float" office:value="67686" calcext:value-type="float">
            <text:p>67686</text:p>
          </table:table-cell>
          <table:table-cell office:value-type="float" office:value="95038" calcext:value-type="float">
            <text:p>95038</text:p>
          </table:table-cell>
        </table:table-row>
        <table:table-row table:style-name="ro1">
          <table:table-cell office:value-type="float" office:value="66591" calcext:value-type="float">
            <text:p>66591</text:p>
          </table:table-cell>
          <table:table-cell office:value-type="float" office:value="95038" calcext:value-type="float">
            <text:p>95038</text:p>
          </table:table-cell>
        </table:table-row>
        <table:table-row table:style-name="ro1">
          <table:table-cell office:value-type="float" office:value="66591" calcext:value-type="float">
            <text:p>66591</text:p>
          </table:table-cell>
          <table:table-cell office:value-type="float" office:value="95192" calcext:value-type="float">
            <text:p>95192</text:p>
          </table:table-cell>
        </table:table-row>
        <table:table-row table:style-name="ro1">
          <table:table-cell office:value-type="float" office:value="65359" calcext:value-type="float">
            <text:p>65359</text:p>
          </table:table-cell>
          <table:table-cell office:value-type="float" office:value="95192" calcext:value-type="float">
            <text:p>95192</text:p>
          </table:table-cell>
        </table:table-row>
        <table:table-row table:style-name="ro1">
          <table:table-cell office:value-type="float" office:value="65359" calcext:value-type="float">
            <text:p>65359</text:p>
          </table:table-cell>
          <table:table-cell office:value-type="float" office:value="96122" calcext:value-type="float">
            <text:p>96122</text:p>
          </table:table-cell>
        </table:table-row>
        <table:table-row table:style-name="ro1">
          <table:table-cell office:value-type="float" office:value="64382" calcext:value-type="float">
            <text:p>64382</text:p>
          </table:table-cell>
          <table:table-cell office:value-type="float" office:value="96122" calcext:value-type="float">
            <text:p>96122</text:p>
          </table:table-cell>
        </table:table-row>
        <table:table-row table:style-name="ro1">
          <table:table-cell office:value-type="float" office:value="64382" calcext:value-type="float">
            <text:p>64382</text:p>
          </table:table-cell>
          <table:table-cell office:value-type="float" office:value="95798" calcext:value-type="float">
            <text:p>95798</text:p>
          </table:table-cell>
        </table:table-row>
        <table:table-row table:style-name="ro1">
          <table:table-cell office:value-type="float" office:value="63018" calcext:value-type="float">
            <text:p>63018</text:p>
          </table:table-cell>
          <table:table-cell office:value-type="float" office:value="95798" calcext:value-type="float">
            <text:p>95798</text:p>
          </table:table-cell>
        </table:table-row>
        <table:table-row table:style-name="ro1">
          <table:table-cell office:value-type="float" office:value="63018" calcext:value-type="float">
            <text:p>63018</text:p>
          </table:table-cell>
          <table:table-cell office:value-type="float" office:value="96235" calcext:value-type="float">
            <text:p>96235</text:p>
          </table:table-cell>
        </table:table-row>
        <table:table-row table:style-name="ro1">
          <table:table-cell office:value-type="float" office:value="61885" calcext:value-type="float">
            <text:p>61885</text:p>
          </table:table-cell>
          <table:table-cell office:value-type="float" office:value="96235" calcext:value-type="float">
            <text:p>96235</text:p>
          </table:table-cell>
        </table:table-row>
        <table:table-row table:style-name="ro1">
          <table:table-cell office:value-type="float" office:value="61885" calcext:value-type="float">
            <text:p>61885</text:p>
          </table:table-cell>
          <table:table-cell office:value-type="float" office:value="97114" calcext:value-type="float">
            <text:p>97114</text:p>
          </table:table-cell>
        </table:table-row>
        <table:table-row table:style-name="ro1">
          <table:table-cell office:value-type="float" office:value="60846" calcext:value-type="float">
            <text:p>60846</text:p>
          </table:table-cell>
          <table:table-cell office:value-type="float" office:value="97114" calcext:value-type="float">
            <text:p>97114</text:p>
          </table:table-cell>
        </table:table-row>
        <table:table-row table:style-name="ro1">
          <table:table-cell office:value-type="float" office:value="60846" calcext:value-type="float">
            <text:p>60846</text:p>
          </table:table-cell>
          <table:table-cell office:value-type="float" office:value="96593" calcext:value-type="float">
            <text:p>96593</text:p>
          </table:table-cell>
        </table:table-row>
        <table:table-row table:style-name="ro1">
          <table:table-cell office:value-type="float" office:value="59490" calcext:value-type="float">
            <text:p>59490</text:p>
          </table:table-cell>
          <table:table-cell office:value-type="float" office:value="96593" calcext:value-type="float">
            <text:p>96593</text:p>
          </table:table-cell>
        </table:table-row>
        <table:table-row table:style-name="ro1">
          <table:table-cell office:value-type="float" office:value="59490" calcext:value-type="float">
            <text:p>59490</text:p>
          </table:table-cell>
          <table:table-cell office:value-type="float" office:value="96963" calcext:value-type="float">
            <text:p>96963</text:p>
          </table:table-cell>
        </table:table-row>
        <table:table-row table:style-name="ro1">
          <table:table-cell office:value-type="float" office:value="58333" calcext:value-type="float">
            <text:p>58333</text:p>
          </table:table-cell>
          <table:table-cell office:value-type="float" office:value="96963" calcext:value-type="float">
            <text:p>96963</text:p>
          </table:table-cell>
        </table:table-row>
        <table:table-row table:style-name="ro1">
          <table:table-cell office:value-type="float" office:value="58333" calcext:value-type="float">
            <text:p>58333</text:p>
          </table:table-cell>
          <table:table-cell office:value-type="float" office:value="97817" calcext:value-type="float">
            <text:p>97817</text:p>
          </table:table-cell>
        </table:table-row>
        <table:table-row table:style-name="ro1">
          <table:table-cell office:value-type="float" office:value="57240" calcext:value-type="float">
            <text:p>57240</text:p>
          </table:table-cell>
          <table:table-cell office:value-type="float" office:value="97817" calcext:value-type="float">
            <text:p>97817</text:p>
          </table:table-cell>
        </table:table-row>
        <table:table-row table:style-name="ro1">
          <table:table-cell office:value-type="float" office:value="57240" calcext:value-type="float">
            <text:p>57240</text:p>
          </table:table-cell>
          <table:table-cell office:value-type="float" office:value="97323" calcext:value-type="float">
            <text:p>97323</text:p>
          </table:table-cell>
        </table:table-row>
        <table:table-row table:style-name="ro1">
          <table:table-cell office:value-type="float" office:value="55943" calcext:value-type="float">
            <text:p>55943</text:p>
          </table:table-cell>
          <table:table-cell office:value-type="float" office:value="97323" calcext:value-type="float">
            <text:p>97323</text:p>
          </table:table-cell>
        </table:table-row>
        <table:table-row table:style-name="ro1">
          <table:table-cell office:value-type="float" office:value="55943" calcext:value-type="float">
            <text:p>55943</text:p>
          </table:table-cell>
          <table:table-cell office:value-type="float" office:value="97753" calcext:value-type="float">
            <text:p>97753</text:p>
          </table:table-cell>
        </table:table-row>
        <table:table-row table:style-name="ro1">
          <table:table-cell office:value-type="float" office:value="54772" calcext:value-type="float">
            <text:p>54772</text:p>
          </table:table-cell>
          <table:table-cell office:value-type="float" office:value="97753" calcext:value-type="float">
            <text:p>97753</text:p>
          </table:table-cell>
        </table:table-row>
        <table:table-row table:style-name="ro1">
          <table:table-cell office:value-type="float" office:value="54772" calcext:value-type="float">
            <text:p>54772</text:p>
          </table:table-cell>
          <table:table-cell office:value-type="float" office:value="97882" calcext:value-type="float">
            <text:p>97882</text:p>
          </table:table-cell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float" office:value="97882" calcext:value-type="float">
            <text:p>97882</text:p>
          </table:table-cell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float" office:value="97681" calcext:value-type="float">
            <text:p>97681</text:p>
          </table:table-cell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float" office:value="97681" calcext:value-type="float">
            <text:p>97681</text:p>
          </table:table-cell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float" office:value="98234" calcext:value-type="float">
            <text:p>98234</text:p>
          </table:table-cell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float" office:value="98234" calcext:value-type="float">
            <text:p>98234</text:p>
          </table:table-cell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float" office:value="98140" calcext:value-type="float">
            <text:p>98140</text:p>
          </table:table-cell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98140" calcext:value-type="float">
            <text:p>98140</text:p>
          </table:table-cell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97985" calcext:value-type="float">
            <text:p>9798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7985" calcext:value-type="float">
            <text:p>9798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7861" calcext:value-type="float">
            <text:p>97861</text:p>
          </table:table-cell>
        </table:table-row>
        <table:table-row table:style-name="ro1">
          <table:table-cell office:value-type="float" office:value="47489" calcext:value-type="float">
            <text:p>47489</text:p>
          </table:table-cell>
          <table:table-cell office:value-type="float" office:value="97861" calcext:value-type="float">
            <text:p>97861</text:p>
          </table:table-cell>
        </table:table-row>
        <table:table-row table:style-name="ro1">
          <table:table-cell office:value-type="float" office:value="47489" calcext:value-type="float">
            <text:p>47489</text:p>
          </table:table-cell>
          <table:table-cell office:value-type="float" office:value="98225" calcext:value-type="float">
            <text:p>98225</text:p>
          </table:table-cell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float" office:value="98225" calcext:value-type="float">
            <text:p>98225</text:p>
          </table:table-cell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float" office:value="97530" calcext:value-type="float">
            <text:p>97530</text:p>
          </table:table-cell>
        </table:table-row>
        <table:table-row table:style-name="ro1">
          <table:table-cell office:value-type="float" office:value="45083" calcext:value-type="float">
            <text:p>45083</text:p>
          </table:table-cell>
          <table:table-cell office:value-type="float" office:value="97530" calcext:value-type="float">
            <text:p>97530</text:p>
          </table:table-cell>
        </table:table-row>
        <table:table-row table:style-name="ro1">
          <table:table-cell office:value-type="float" office:value="45083" calcext:value-type="float">
            <text:p>45083</text:p>
          </table:table-cell>
          <table:table-cell office:value-type="float" office:value="97603" calcext:value-type="float">
            <text:p>97603</text:p>
          </table:table-cell>
        </table:table-row>
        <table:table-row table:style-name="ro1">
          <table:table-cell office:value-type="float" office:value="43853" calcext:value-type="float">
            <text:p>43853</text:p>
          </table:table-cell>
          <table:table-cell office:value-type="float" office:value="97603" calcext:value-type="float">
            <text:p>97603</text:p>
          </table:table-cell>
        </table:table-row>
        <table:table-row table:style-name="ro1">
          <table:table-cell office:value-type="float" office:value="43853" calcext:value-type="float">
            <text:p>43853</text:p>
          </table:table-cell>
          <table:table-cell office:value-type="float" office:value="97064" calcext:value-type="float">
            <text:p>97064</text:p>
          </table:table-cell>
        </table:table-row>
        <table:table-row table:style-name="ro1">
          <table:table-cell office:value-type="float" office:value="42706" calcext:value-type="float">
            <text:p>42706</text:p>
          </table:table-cell>
          <table:table-cell office:value-type="float" office:value="97064" calcext:value-type="float">
            <text:p>97064</text:p>
          </table:table-cell>
        </table:table-row>
        <table:table-row table:style-name="ro1">
          <table:table-cell office:value-type="float" office:value="42706" calcext:value-type="float">
            <text:p>42706</text:p>
          </table:table-cell>
          <table:table-cell office:value-type="float" office:value="97243" calcext:value-type="float">
            <text:p>97243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float" office:value="97243" calcext:value-type="float">
            <text:p>97243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float" office:value="96639" calcext:value-type="float">
            <text:p>96639</text:p>
          </table:table-cell>
        </table:table-row>
        <table:table-row table:style-name="ro1">
          <table:table-cell office:value-type="float" office:value="40330" calcext:value-type="float">
            <text:p>40330</text:p>
          </table:table-cell>
          <table:table-cell office:value-type="float" office:value="96639" calcext:value-type="float">
            <text:p>96639</text:p>
          </table:table-cell>
        </table:table-row>
        <table:table-row table:style-name="ro1">
          <table:table-cell office:value-type="float" office:value="40330" calcext:value-type="float">
            <text:p>40330</text:p>
          </table:table-cell>
          <table:table-cell office:value-type="float" office:value="97028" calcext:value-type="float">
            <text:p>9702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97028" calcext:value-type="float">
            <text:p>9702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96182" calcext:value-type="float">
            <text:p>96182</text:p>
          </table:table-cell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96182" calcext:value-type="float">
            <text:p>96182</text:p>
          </table:table-cell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float" office:value="36816" calcext:value-type="float">
            <text:p>36816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float" office:value="36816" calcext:value-type="float">
            <text:p>36816</text:p>
          </table:table-cell>
          <table:table-cell office:value-type="float" office:value="96061" calcext:value-type="float">
            <text:p>96061</text:p>
          </table:table-cell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96061" calcext:value-type="float">
            <text:p>96061</text:p>
          </table:table-cell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95194" calcext:value-type="float">
            <text:p>95194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float" office:value="95194" calcext:value-type="float">
            <text:p>95194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float" office:value="94669" calcext:value-type="float">
            <text:p>94669</text:p>
          </table:table-cell>
        </table:table-row>
        <table:table-row table:style-name="ro1">
          <table:table-cell office:value-type="float" office:value="33367" calcext:value-type="float">
            <text:p>33367</text:p>
          </table:table-cell>
          <table:table-cell office:value-type="float" office:value="94669" calcext:value-type="float">
            <text:p>94669</text:p>
          </table:table-cell>
        </table:table-row>
        <table:table-row table:style-name="ro1">
          <table:table-cell office:value-type="float" office:value="33367" calcext:value-type="float">
            <text:p>33367</text:p>
          </table:table-cell>
          <table:table-cell office:value-type="float" office:value="94176" calcext:value-type="float">
            <text:p>94176</text:p>
          </table:table-cell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float" office:value="94176" calcext:value-type="float">
            <text:p>94176</text:p>
          </table:table-cell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float" office:value="94261" calcext:value-type="float">
            <text:p>94261</text:p>
          </table:table-cell>
        </table:table-row>
        <table:table-row table:style-name="ro1">
          <table:table-cell office:value-type="float" office:value="30914" calcext:value-type="float">
            <text:p>30914</text:p>
          </table:table-cell>
          <table:table-cell office:value-type="float" office:value="94261" calcext:value-type="float">
            <text:p>94261</text:p>
          </table:table-cell>
        </table:table-row>
        <table:table-row table:style-name="ro1">
          <table:table-cell office:value-type="float" office:value="30914" calcext:value-type="float">
            <text:p>30914</text:p>
          </table:table-cell>
          <table:table-cell office:value-type="float" office:value="93626" calcext:value-type="float">
            <text:p>93626</text:p>
          </table:table-cell>
        </table:table-row>
        <table:table-row table:style-name="ro1">
          <table:table-cell office:value-type="float" office:value="29862" calcext:value-type="float">
            <text:p>29862</text:p>
          </table:table-cell>
          <table:table-cell office:value-type="float" office:value="93626" calcext:value-type="float">
            <text:p>93626</text:p>
          </table:table-cell>
        </table:table-row>
        <table:table-row table:style-name="ro1">
          <table:table-cell office:value-type="float" office:value="29862" calcext:value-type="float">
            <text:p>29862</text:p>
          </table:table-cell>
          <table:table-cell office:value-type="float" office:value="93349" calcext:value-type="float">
            <text:p>93349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float" office:value="93349" calcext:value-type="float">
            <text:p>93349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float" office:value="92466" calcext:value-type="float">
            <text:p>92466</text:p>
          </table:table-cell>
        </table:table-row>
        <table:table-row table:style-name="ro1">
          <table:table-cell office:value-type="float" office:value="27723" calcext:value-type="float">
            <text:p>27723</text:p>
          </table:table-cell>
          <table:table-cell office:value-type="float" office:value="92466" calcext:value-type="float">
            <text:p>92466</text:p>
          </table:table-cell>
        </table:table-row>
        <table:table-row table:style-name="ro1">
          <table:table-cell office:value-type="float" office:value="27723" calcext:value-type="float">
            <text:p>27723</text:p>
          </table:table-cell>
          <table:table-cell office:value-type="float" office:value="91923" calcext:value-type="float">
            <text:p>91923</text:p>
          </table:table-cell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float" office:value="91923" calcext:value-type="float">
            <text:p>91923</text:p>
          </table:table-cell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float" office:value="91142" calcext:value-type="float">
            <text:p>91142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  <table:table-cell office:value-type="float" office:value="91142" calcext:value-type="float">
            <text:p>91142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  <table:table-cell office:value-type="float" office:value="90284" calcext:value-type="float">
            <text:p>90284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90284" calcext:value-type="float">
            <text:p>90284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89649" calcext:value-type="float">
            <text:p>89649</text:p>
          </table:table-cell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89649" calcext:value-type="float">
            <text:p>89649</text:p>
          </table:table-cell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89044" calcext:value-type="float">
            <text:p>89044</text:p>
          </table:table-cell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float" office:value="89044" calcext:value-type="float">
            <text:p>89044</text:p>
          </table:table-cell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float" office:value="89033" calcext:value-type="float">
            <text:p>89033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float" office:value="89033" calcext:value-type="float">
            <text:p>89033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float" office:value="87870" calcext:value-type="float">
            <text:p>87870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87870" calcext:value-type="float">
            <text:p>87870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86768" calcext:value-type="float">
            <text:p>86768</text:p>
          </table:table-cell>
        </table:table-row>
        <table:table-row table:style-name="ro1">
          <table:table-cell office:value-type="float" office:value="19912" calcext:value-type="float">
            <text:p>19912</text:p>
          </table:table-cell>
          <table:table-cell office:value-type="float" office:value="86768" calcext:value-type="float">
            <text:p>86768</text:p>
          </table:table-cell>
        </table:table-row>
        <table:table-row table:style-name="ro1">
          <table:table-cell office:value-type="float" office:value="19912" calcext:value-type="float">
            <text:p>19912</text:p>
          </table:table-cell>
          <table:table-cell office:value-type="float" office:value="86556" calcext:value-type="float">
            <text:p>86556</text:p>
          </table:table-cell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float" office:value="86556" calcext:value-type="float">
            <text:p>86556</text:p>
          </table:table-cell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float" office:value="85786" calcext:value-type="float">
            <text:p>85786</text:p>
          </table:table-cell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float" office:value="85786" calcext:value-type="float">
            <text:p>85786</text:p>
          </table:table-cell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float" office:value="84873" calcext:value-type="float">
            <text:p>84873</text:p>
          </table:table-cell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float" office:value="84873" calcext:value-type="float">
            <text:p>84873</text:p>
          </table:table-cell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float" office:value="83642" calcext:value-type="float">
            <text:p>83642</text:p>
          </table:table-cell>
        </table:table-row>
        <table:table-row table:style-name="ro1">
          <table:table-cell office:value-type="float" office:value="16239" calcext:value-type="float">
            <text:p>16239</text:p>
          </table:table-cell>
          <table:table-cell office:value-type="float" office:value="83642" calcext:value-type="float">
            <text:p>83642</text:p>
          </table:table-cell>
        </table:table-row>
        <table:table-row table:style-name="ro1">
          <table:table-cell office:value-type="float" office:value="16239" calcext:value-type="float">
            <text:p>16239</text:p>
          </table:table-cell>
          <table:table-cell office:value-type="float" office:value="82803" calcext:value-type="float">
            <text:p>82803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float" office:value="82803" calcext:value-type="float">
            <text:p>82803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float" office:value="81915" calcext:value-type="float">
            <text:p>81915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81915" calcext:value-type="float">
            <text:p>81915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81502" calcext:value-type="float">
            <text:p>81502</text:p>
          </table:table-cell>
        </table:table-row>
        <table:table-row table:style-name="ro1">
          <table:table-cell office:value-type="float" office:value="13174" calcext:value-type="float">
            <text:p>13174</text:p>
          </table:table-cell>
          <table:table-cell office:value-type="float" office:value="81502" calcext:value-type="float">
            <text:p>81502</text:p>
          </table:table-cell>
        </table:table-row>
        <table:table-row table:style-name="ro1">
          <table:table-cell office:value-type="float" office:value="13174" calcext:value-type="float">
            <text:p>13174</text:p>
          </table:table-cell>
          <table:table-cell office:value-type="float" office:value="80154" calcext:value-type="float">
            <text:p>80154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float" office:value="80154" calcext:value-type="float">
            <text:p>80154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float" office:value="79241" calcext:value-type="float">
            <text:p>79241</text:p>
          </table:table-cell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float" office:value="79241" calcext:value-type="float">
            <text:p>79241</text:p>
          </table:table-cell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float" office:value="78154" calcext:value-type="float">
            <text:p>78154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78154" calcext:value-type="float">
            <text:p>78154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77247" calcext:value-type="float">
            <text:p>77247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77247" calcext:value-type="float">
            <text:p>77247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76344" calcext:value-type="float">
            <text:p>76344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float" office:value="76344" calcext:value-type="float">
            <text:p>76344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float" office:value="75474" calcext:value-type="float">
            <text:p>75474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75474" calcext:value-type="float">
            <text:p>75474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74432" calcext:value-type="float">
            <text:p>74432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74432" calcext:value-type="float">
            <text:p>74432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73056" calcext:value-type="float">
            <text:p>73056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float" office:value="73056" calcext:value-type="float">
            <text:p>73056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float" office:value="71924" calcext:value-type="float">
            <text:p>71924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71924" calcext:value-type="float">
            <text:p>71924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71136" calcext:value-type="float">
            <text:p>71136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71136" calcext:value-type="float">
            <text:p>71136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70084" calcext:value-type="float">
            <text:p>70084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70084" calcext:value-type="float">
            <text:p>70084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8943" calcext:value-type="float">
            <text:p>68943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8943" calcext:value-type="float">
            <text:p>68943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7626" calcext:value-type="float">
            <text:p>6762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67626" calcext:value-type="float">
            <text:p>6762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5295" calcext:value-type="float">
            <text:p>6529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65295" calcext:value-type="float">
            <text:p>6529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64323" calcext:value-type="float">
            <text:p>6432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4323" calcext:value-type="float">
            <text:p>6432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3210" calcext:value-type="float">
            <text:p>6321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3210" calcext:value-type="float">
            <text:p>6321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1847" calcext:value-type="float">
            <text:p>61847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61847" calcext:value-type="float">
            <text:p>61847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60830" calcext:value-type="float">
            <text:p>6083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0830" calcext:value-type="float">
            <text:p>6083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59645" calcext:value-type="float">
            <text:p>59645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59645" calcext:value-type="float">
            <text:p>59645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58357" calcext:value-type="float">
            <text:p>5835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58357" calcext:value-type="float">
            <text:p>5835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57232" calcext:value-type="float">
            <text:p>5723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7232" calcext:value-type="float">
            <text:p>5723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6011" calcext:value-type="float">
            <text:p>5601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56011" calcext:value-type="float">
            <text:p>5601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54780" calcext:value-type="float">
            <text:p>5478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4780" calcext:value-type="float">
            <text:p>5478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3538" calcext:value-type="float">
            <text:p>5353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3538" calcext:value-type="float">
            <text:p>5353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2332" calcext:value-type="float">
            <text:p>52332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52332" calcext:value-type="float">
            <text:p>52332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51144" calcext:value-type="float">
            <text:p>5114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1144" calcext:value-type="float">
            <text:p>5114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0077" calcext:value-type="float">
            <text:p>50077</text:p>
          </table:table-cell>
        </table:table-row>
        <table:table-row table:style-name="ro1">
          <table:table-cell office:value-type="float" office:value="94564" calcext:value-type="float">
            <text:p>94564</text:p>
          </table:table-cell>
          <table:table-cell office:value-type="float" office:value="50077" calcext:value-type="float">
            <text:p>50077</text:p>
          </table:table-cell>
        </table:table-row>
        <table:table-row table:style-name="ro1">
          <table:table-cell office:value-type="float" office:value="94564" calcext:value-type="float">
            <text:p>94564</text:p>
          </table:table-cell>
          <table:table-cell office:value-type="float" office:value="48699" calcext:value-type="float">
            <text:p>4869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8699" calcext:value-type="float">
            <text:p>4869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7491" calcext:value-type="float">
            <text:p>47491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7491" calcext:value-type="float">
            <text:p>47491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6248" calcext:value-type="float">
            <text:p>4624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6248" calcext:value-type="float">
            <text:p>4624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5029" calcext:value-type="float">
            <text:p>4502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5029" calcext:value-type="float">
            <text:p>4502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2591" calcext:value-type="float">
            <text:p>4259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2591" calcext:value-type="float">
            <text:p>4259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1374" calcext:value-type="float">
            <text:p>41374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1374" calcext:value-type="float">
            <text:p>41374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0287" calcext:value-type="float">
            <text:p>40287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40287" calcext:value-type="float">
            <text:p>40287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9152" calcext:value-type="float">
            <text:p>3915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9152" calcext:value-type="float">
            <text:p>3915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7933" calcext:value-type="float">
            <text:p>37933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7933" calcext:value-type="float">
            <text:p>37933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6808" calcext:value-type="float">
            <text:p>36808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36808" calcext:value-type="float">
            <text:p>36808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35435" calcext:value-type="float">
            <text:p>3543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5435" calcext:value-type="float">
            <text:p>3543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3344" calcext:value-type="float">
            <text:p>33344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33344" calcext:value-type="float">
            <text:p>33344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32241" calcext:value-type="float">
            <text:p>32241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32241" calcext:value-type="float">
            <text:p>32241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30972" calcext:value-type="float">
            <text:p>30972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30972" calcext:value-type="float">
            <text:p>30972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29684" calcext:value-type="float">
            <text:p>29684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29684" calcext:value-type="float">
            <text:p>29684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28831" calcext:value-type="float">
            <text:p>28831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8831" calcext:value-type="float">
            <text:p>28831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7618" calcext:value-type="float">
            <text:p>2761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7618" calcext:value-type="float">
            <text:p>2761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6782" calcext:value-type="float">
            <text:p>26782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26782" calcext:value-type="float">
            <text:p>26782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24742" calcext:value-type="float">
            <text:p>24742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24742" calcext:value-type="float">
            <text:p>24742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float" office:value="22709" calcext:value-type="float">
            <text:p>22709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22709" calcext:value-type="float">
            <text:p>22709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11703" calcext:value-type="float">
            <text:p>11703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11703" calcext:value-type="float">
            <text:p>11703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float" office:value="19776" calcext:value-type="float">
            <text:p>19776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19776" calcext:value-type="float">
            <text:p>19776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17670" calcext:value-type="float">
            <text:p>1767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17670" calcext:value-type="float">
            <text:p>1767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16081" calcext:value-type="float">
            <text:p>16081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16081" calcext:value-type="float">
            <text:p>16081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15443" calcext:value-type="float">
            <text:p>15443</text:p>
          </table:table-cell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15443" calcext:value-type="float">
            <text:p>15443</text:p>
          </table:table-cell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17623" calcext:value-type="float">
            <text:p>17623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17623" calcext:value-type="float">
            <text:p>17623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float" office:value="18925" calcext:value-type="float">
            <text:p>18925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float" office:value="18925" calcext:value-type="float">
            <text:p>18925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19774" calcext:value-type="float">
            <text:p>19774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19774" calcext:value-type="float">
            <text:p>19774</text:p>
          </table:table-cell>
          <table:table-cell office:value-type="float" office:value="11885" calcext:value-type="float">
            <text:p>11885</text:p>
          </table:table-cell>
        </table:table-row>
        <table:table-row table:style-name="ro1">
          <table:table-cell office:value-type="float" office:value="20603" calcext:value-type="float">
            <text:p>20603</text:p>
          </table:table-cell>
          <table:table-cell office:value-type="float" office:value="11885" calcext:value-type="float">
            <text:p>11885</text:p>
          </table:table-cell>
        </table:table-row>
        <table:table-row table:style-name="ro1">
          <table:table-cell office:value-type="float" office:value="20603" calcext:value-type="float">
            <text:p>20603</text:p>
          </table:table-cell>
          <table:table-cell office:value-type="float" office:value="11237" calcext:value-type="float">
            <text:p>11237</text:p>
          </table:table-cell>
        </table:table-row>
        <table:table-row table:style-name="ro1">
          <table:table-cell office:value-type="float" office:value="21639" calcext:value-type="float">
            <text:p>21639</text:p>
          </table:table-cell>
          <table:table-cell office:value-type="float" office:value="11237" calcext:value-type="float">
            <text:p>11237</text:p>
          </table:table-cell>
        </table:table-row>
        <table:table-row table:style-name="ro1">
          <table:table-cell office:value-type="float" office:value="21639" calcext:value-type="float">
            <text:p>21639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23920" calcext:value-type="float">
            <text:p>23920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23920" calcext:value-type="float">
            <text:p>23920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26741" calcext:value-type="float">
            <text:p>26741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26741" calcext:value-type="float">
            <text:p>26741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29059" calcext:value-type="float">
            <text:p>29059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29059" calcext:value-type="float">
            <text:p>29059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31281" calcext:value-type="float">
            <text:p>31281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31281" calcext:value-type="float">
            <text:p>31281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float" office:value="32374" calcext:value-type="float">
            <text:p>32374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float" office:value="32374" calcext:value-type="float">
            <text:p>32374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34675" calcext:value-type="float">
            <text:p>34675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34675" calcext:value-type="float">
            <text:p>34675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5581" calcext:value-type="float">
            <text:p>35581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5581" calcext:value-type="float">
            <text:p>35581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6911" calcext:value-type="float">
            <text:p>36911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6911" calcext:value-type="float">
            <text:p>3691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7928" calcext:value-type="float">
            <text:p>3792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7928" calcext:value-type="float">
            <text:p>37928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9322" calcext:value-type="float">
            <text:p>39322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9322" calcext:value-type="float">
            <text:p>3932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40322" calcext:value-type="float">
            <text:p>4032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40322" calcext:value-type="float">
            <text:p>40322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44053" calcext:value-type="float">
            <text:p>4405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44053" calcext:value-type="float">
            <text:p>44053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46407" calcext:value-type="float">
            <text:p>46407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46407" calcext:value-type="float">
            <text:p>46407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47666" calcext:value-type="float">
            <text:p>47666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47666" calcext:value-type="float">
            <text:p>4766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48861" calcext:value-type="float">
            <text:p>4886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48861" calcext:value-type="float">
            <text:p>48861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50083" calcext:value-type="float">
            <text:p>50083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50083" calcext:value-type="float">
            <text:p>5008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1297" calcext:value-type="float">
            <text:p>51297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1297" calcext:value-type="float">
            <text:p>51297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52496" calcext:value-type="float">
            <text:p>52496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52496" calcext:value-type="float">
            <text:p>5249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54893" calcext:value-type="float">
            <text:p>54893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54893" calcext:value-type="float">
            <text:p>54893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57286" calcext:value-type="float">
            <text:p>57286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57286" calcext:value-type="float">
            <text:p>57286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58597" calcext:value-type="float">
            <text:p>58597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58597" calcext:value-type="float">
            <text:p>58597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59842" calcext:value-type="float">
            <text:p>5984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59842" calcext:value-type="float">
            <text:p>5984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60995" calcext:value-type="float">
            <text:p>60995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60995" calcext:value-type="float">
            <text:p>60995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62099" calcext:value-type="float">
            <text:p>62099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62099" calcext:value-type="float">
            <text:p>6209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63386" calcext:value-type="float">
            <text:p>63386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63386" calcext:value-type="float">
            <text:p>63386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65519" calcext:value-type="float">
            <text:p>65519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65519" calcext:value-type="float">
            <text:p>6551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6579" calcext:value-type="float">
            <text:p>6657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6579" calcext:value-type="float">
            <text:p>6657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67922" calcext:value-type="float">
            <text:p>67922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67922" calcext:value-type="float">
            <text:p>67922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69019" calcext:value-type="float">
            <text:p>69019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69019" calcext:value-type="float">
            <text:p>69019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0024" calcext:value-type="float">
            <text:p>70024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0024" calcext:value-type="float">
            <text:p>70024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71049" calcext:value-type="float">
            <text:p>71049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71049" calcext:value-type="float">
            <text:p>71049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72456" calcext:value-type="float">
            <text:p>7245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72456" calcext:value-type="float">
            <text:p>72456</text:p>
          </table:table-cell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73199" calcext:value-type="float">
            <text:p>73199</text:p>
          </table:table-cell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73199" calcext:value-type="float">
            <text:p>73199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74258" calcext:value-type="float">
            <text:p>74258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74258" calcext:value-type="float">
            <text:p>74258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75647" calcext:value-type="float">
            <text:p>75647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75647" calcext:value-type="float">
            <text:p>75647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float" office:value="76431" calcext:value-type="float">
            <text:p>76431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float" office:value="76431" calcext:value-type="float">
            <text:p>76431</text:p>
          </table:table-cell>
          <table:table-cell office:value-type="float" office:value="10371" calcext:value-type="float">
            <text:p>10371</text:p>
          </table:table-cell>
        </table:table-row>
        <table:table-row table:style-name="ro1">
          <table:table-cell office:value-type="float" office:value="77684" calcext:value-type="float">
            <text:p>77684</text:p>
          </table:table-cell>
          <table:table-cell office:value-type="float" office:value="10371" calcext:value-type="float">
            <text:p>10371</text:p>
          </table:table-cell>
        </table:table-row>
        <table:table-row table:style-name="ro1">
          <table:table-cell office:value-type="float" office:value="77684" calcext:value-type="float">
            <text:p>77684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78280" calcext:value-type="float">
            <text:p>78280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78280" calcext:value-type="float">
            <text:p>78280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79366" calcext:value-type="float">
            <text:p>79366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79366" calcext:value-type="float">
            <text:p>79366</text:p>
          </table:table-cell>
          <table:table-cell office:value-type="float" office:value="13138" calcext:value-type="float">
            <text:p>13138</text:p>
          </table:table-cell>
        </table:table-row>
        <table:table-row table:style-name="ro1">
          <table:table-cell office:value-type="float" office:value="80163" calcext:value-type="float">
            <text:p>80163</text:p>
          </table:table-cell>
          <table:table-cell office:value-type="float" office:value="13138" calcext:value-type="float">
            <text:p>13138</text:p>
          </table:table-cell>
        </table:table-row>
        <table:table-row table:style-name="ro1">
          <table:table-cell office:value-type="float" office:value="80163" calcext:value-type="float">
            <text:p>80163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81379" calcext:value-type="float">
            <text:p>81379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81379" calcext:value-type="float">
            <text:p>81379</text:p>
          </table:table-cell>
          <table:table-cell office:value-type="float" office:value="14747" calcext:value-type="float">
            <text:p>14747</text:p>
          </table:table-cell>
        </table:table-row>
        <table:table-row table:style-name="ro1">
          <table:table-cell office:value-type="float" office:value="81960" calcext:value-type="float">
            <text:p>81960</text:p>
          </table:table-cell>
          <table:table-cell office:value-type="float" office:value="14747" calcext:value-type="float">
            <text:p>14747</text:p>
          </table:table-cell>
        </table:table-row>
        <table:table-row table:style-name="ro1">
          <table:table-cell office:value-type="float" office:value="81960" calcext:value-type="float">
            <text:p>81960</text:p>
          </table:table-cell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82988" calcext:value-type="float">
            <text:p>82988</text:p>
          </table:table-cell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82988" calcext:value-type="float">
            <text:p>82988</text:p>
          </table:table-cell>
          <table:table-cell office:value-type="float" office:value="15786" calcext:value-type="float">
            <text:p>15786</text:p>
          </table:table-cell>
        </table:table-row>
        <table:table-row table:style-name="ro1">
          <table:table-cell office:value-type="float" office:value="84332" calcext:value-type="float">
            <text:p>84332</text:p>
          </table:table-cell>
          <table:table-cell office:value-type="float" office:value="15786" calcext:value-type="float">
            <text:p>15786</text:p>
          </table:table-cell>
        </table:table-row>
        <table:table-row table:style-name="ro1">
          <table:table-cell office:value-type="float" office:value="84332" calcext:value-type="float">
            <text:p>84332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float" office:value="84729" calcext:value-type="float">
            <text:p>84729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float" office:value="84729" calcext:value-type="float">
            <text:p>84729</text:p>
          </table:table-cell>
          <table:table-cell office:value-type="float" office:value="17556" calcext:value-type="float">
            <text:p>17556</text:p>
          </table:table-cell>
        </table:table-row>
        <table:table-row table:style-name="ro1">
          <table:table-cell office:value-type="float" office:value="86036" calcext:value-type="float">
            <text:p>86036</text:p>
          </table:table-cell>
          <table:table-cell office:value-type="float" office:value="17556" calcext:value-type="float">
            <text:p>17556</text:p>
          </table:table-cell>
        </table:table-row>
        <table:table-row table:style-name="ro1">
          <table:table-cell office:value-type="float" office:value="86036" calcext:value-type="float">
            <text:p>86036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float" office:value="86618" calcext:value-type="float">
            <text:p>86618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float" office:value="86618" calcext:value-type="float">
            <text:p>86618</text:p>
          </table:table-cell>
          <table:table-cell office:value-type="float" office:value="19885" calcext:value-type="float">
            <text:p>19885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19885" calcext:value-type="float">
            <text:p>19885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20678" calcext:value-type="float">
            <text:p>20678</text:p>
          </table:table-cell>
        </table:table-row>
        <table:table-row table:style-name="ro1">
          <table:table-cell office:value-type="float" office:value="88017" calcext:value-type="float">
            <text:p>88017</text:p>
          </table:table-cell>
          <table:table-cell office:value-type="float" office:value="20678" calcext:value-type="float">
            <text:p>20678</text:p>
          </table:table-cell>
        </table:table-row>
        <table:table-row table:style-name="ro1">
          <table:table-cell office:value-type="float" office:value="88017" calcext:value-type="float">
            <text:p>88017</text:p>
          </table:table-cell>
          <table:table-cell office:value-type="float" office:value="21427" calcext:value-type="float">
            <text:p>21427</text:p>
          </table:table-cell>
        </table:table-row>
        <table:table-row table:style-name="ro1">
          <table:table-cell office:value-type="float" office:value="89052" calcext:value-type="float">
            <text:p>89052</text:p>
          </table:table-cell>
          <table:table-cell office:value-type="float" office:value="21427" calcext:value-type="float">
            <text:p>21427</text:p>
          </table:table-cell>
        </table:table-row>
        <table:table-row table:style-name="ro1">
          <table:table-cell office:value-type="float" office:value="89052" calcext:value-type="float">
            <text:p>89052</text:p>
          </table:table-cell>
          <table:table-cell office:value-type="float" office:value="22897" calcext:value-type="float">
            <text:p>22897</text:p>
          </table:table-cell>
        </table:table-row>
        <table:table-row table:style-name="ro1">
          <table:table-cell office:value-type="float" office:value="89084" calcext:value-type="float">
            <text:p>89084</text:p>
          </table:table-cell>
          <table:table-cell office:value-type="float" office:value="22897" calcext:value-type="float">
            <text:p>22897</text:p>
          </table:table-cell>
        </table:table-row>
        <table:table-row table:style-name="ro1">
          <table:table-cell office:value-type="float" office:value="89084" calcext:value-type="float">
            <text:p>89084</text:p>
          </table:table-cell>
          <table:table-cell office:value-type="float" office:value="23637" calcext:value-type="float">
            <text:p>23637</text:p>
          </table:table-cell>
        </table:table-row>
        <table:table-row table:style-name="ro1">
          <table:table-cell office:value-type="float" office:value="90152" calcext:value-type="float">
            <text:p>90152</text:p>
          </table:table-cell>
          <table:table-cell office:value-type="float" office:value="23637" calcext:value-type="float">
            <text:p>23637</text:p>
          </table:table-cell>
        </table:table-row>
        <table:table-row table:style-name="ro1">
          <table:table-cell office:value-type="float" office:value="90152" calcext:value-type="float">
            <text:p>90152</text:p>
          </table:table-cell>
          <table:table-cell office:value-type="float" office:value="24701" calcext:value-type="float">
            <text:p>24701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float" office:value="24701" calcext:value-type="float">
            <text:p>24701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float" office:value="25874" calcext:value-type="float">
            <text:p>25874</text:p>
          </table:table-cell>
        </table:table-row>
        <table:table-row table:style-name="ro1">
          <table:table-cell office:value-type="float" office:value="91146" calcext:value-type="float">
            <text:p>91146</text:p>
          </table:table-cell>
          <table:table-cell office:value-type="float" office:value="25874" calcext:value-type="float">
            <text:p>25874</text:p>
          </table:table-cell>
        </table:table-row>
        <table:table-row table:style-name="ro1">
          <table:table-cell office:value-type="float" office:value="91146" calcext:value-type="float">
            <text:p>91146</text:p>
          </table:table-cell>
          <table:table-cell office:value-type="float" office:value="26704" calcext:value-type="float">
            <text:p>26704</text:p>
          </table:table-cell>
        </table:table-row>
        <table:table-row table:style-name="ro1">
          <table:table-cell office:value-type="float" office:value="92143" calcext:value-type="float">
            <text:p>92143</text:p>
          </table:table-cell>
          <table:table-cell office:value-type="float" office:value="26704" calcext:value-type="float">
            <text:p>26704</text:p>
          </table:table-cell>
        </table:table-row>
        <table:table-row table:style-name="ro1">
          <table:table-cell office:value-type="float" office:value="92143" calcext:value-type="float">
            <text:p>92143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float" office:value="92552" calcext:value-type="float">
            <text:p>92552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float" office:value="92552" calcext:value-type="float">
            <text:p>92552</text:p>
          </table:table-cell>
          <table:table-cell office:value-type="float" office:value="28994" calcext:value-type="float">
            <text:p>28994</text:p>
          </table:table-cell>
        </table:table-row>
        <table:table-row table:style-name="ro1">
          <table:table-cell office:value-type="float" office:value="93011" calcext:value-type="float">
            <text:p>93011</text:p>
          </table:table-cell>
          <table:table-cell office:value-type="float" office:value="28994" calcext:value-type="float">
            <text:p>28994</text:p>
          </table:table-cell>
        </table:table-row>
        <table:table-row table:style-name="ro1">
          <table:table-cell office:value-type="float" office:value="93011" calcext:value-type="float">
            <text:p>93011</text:p>
          </table:table-cell>
          <table:table-cell office:value-type="float" office:value="29977" calcext:value-type="float">
            <text:p>29977</text:p>
          </table:table-cell>
        </table:table-row>
        <table:table-row table:style-name="ro1">
          <table:table-cell office:value-type="float" office:value="93776" calcext:value-type="float">
            <text:p>93776</text:p>
          </table:table-cell>
          <table:table-cell office:value-type="float" office:value="29977" calcext:value-type="float">
            <text:p>29977</text:p>
          </table:table-cell>
        </table:table-row>
        <table:table-row table:style-name="ro1">
          <table:table-cell office:value-type="float" office:value="93776" calcext:value-type="float">
            <text:p>93776</text:p>
          </table:table-cell>
          <table:table-cell office:value-type="float" office:value="31177" calcext:value-type="float">
            <text:p>31177</text:p>
          </table:table-cell>
        </table:table-row>
        <table:table-row table:style-name="ro1">
          <table:table-cell office:value-type="float" office:value="94072" calcext:value-type="float">
            <text:p>94072</text:p>
          </table:table-cell>
          <table:table-cell office:value-type="float" office:value="31177" calcext:value-type="float">
            <text:p>31177</text:p>
          </table:table-cell>
        </table:table-row>
        <table:table-row table:style-name="ro1">
          <table:table-cell office:value-type="float" office:value="94072" calcext:value-type="float">
            <text:p>94072</text:p>
          </table:table-cell>
          <table:table-cell office:value-type="float" office:value="32226" calcext:value-type="float">
            <text:p>32226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2226" calcext:value-type="float">
            <text:p>32226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3435" calcext:value-type="float">
            <text:p>33435</text:p>
          </table:table-cell>
        </table:table-row>
        <table:table-row table:style-name="ro1">
          <table:table-cell office:value-type="float" office:value="94966" calcext:value-type="float">
            <text:p>94966</text:p>
          </table:table-cell>
          <table:table-cell office:value-type="float" office:value="33435" calcext:value-type="float">
            <text:p>33435</text:p>
          </table:table-cell>
        </table:table-row>
        <table:table-row table:style-name="ro1">
          <table:table-cell office:value-type="float" office:value="94966" calcext:value-type="float">
            <text:p>94966</text:p>
          </table:table-cell>
          <table:table-cell office:value-type="float" office:value="34438" calcext:value-type="float">
            <text:p>34438</text:p>
          </table:table-cell>
        </table:table-row>
        <table:table-row table:style-name="ro1">
          <table:table-cell office:value-type="float" office:value="95787" calcext:value-type="float">
            <text:p>95787</text:p>
          </table:table-cell>
          <table:table-cell office:value-type="float" office:value="34438" calcext:value-type="float">
            <text:p>34438</text:p>
          </table:table-cell>
        </table:table-row>
        <table:table-row table:style-name="ro1">
          <table:table-cell office:value-type="float" office:value="95787" calcext:value-type="float">
            <text:p>95787</text:p>
          </table:table-cell>
          <table:table-cell office:value-type="float" office:value="35578" calcext:value-type="float">
            <text:p>35578</text:p>
          </table:table-cell>
        </table:table-row>
        <table:table-row table:style-name="ro1">
          <table:table-cell office:value-type="float" office:value="96246" calcext:value-type="float">
            <text:p>96246</text:p>
          </table:table-cell>
          <table:table-cell office:value-type="float" office:value="35578" calcext:value-type="float">
            <text:p>35578</text:p>
          </table:table-cell>
        </table:table-row>
        <table:table-row table:style-name="ro1">
          <table:table-cell office:value-type="float" office:value="96246" calcext:value-type="float">
            <text:p>96246</text:p>
          </table:table-cell>
          <table:table-cell office:value-type="float" office:value="37010" calcext:value-type="float">
            <text:p>37010</text:p>
          </table:table-cell>
        </table:table-row>
        <table:table-row table:style-name="ro1">
          <table:table-cell office:value-type="float" office:value="95696" calcext:value-type="float">
            <text:p>95696</text:p>
          </table:table-cell>
          <table:table-cell office:value-type="float" office:value="37010" calcext:value-type="float">
            <text:p>37010</text:p>
          </table:table-cell>
        </table:table-row>
        <table:table-row table:style-name="ro1">
          <table:table-cell office:value-type="float" office:value="95696" calcext:value-type="float">
            <text:p>95696</text:p>
          </table:table-cell>
          <table:table-cell office:value-type="float" office:value="37956" calcext:value-type="float">
            <text:p>37956</text:p>
          </table:table-cell>
        </table:table-row>
        <table:table-row table:style-name="ro1">
          <table:table-cell office:value-type="float" office:value="96851" calcext:value-type="float">
            <text:p>96851</text:p>
          </table:table-cell>
          <table:table-cell office:value-type="float" office:value="37956" calcext:value-type="float">
            <text:p>37956</text:p>
          </table:table-cell>
        </table:table-row>
        <table:table-row table:style-name="ro1">
          <table:table-cell office:value-type="float" office:value="96851" calcext:value-type="float">
            <text:p>96851</text:p>
          </table:table-cell>
          <table:table-cell office:value-type="float" office:value="39327" calcext:value-type="float">
            <text:p>39327</text:p>
          </table:table-cell>
        </table:table-row>
        <table:table-row table:style-name="ro1">
          <table:table-cell office:value-type="float" office:value="96359" calcext:value-type="float">
            <text:p>96359</text:p>
          </table:table-cell>
          <table:table-cell office:value-type="float" office:value="39327" calcext:value-type="float">
            <text:p>39327</text:p>
          </table:table-cell>
        </table:table-row>
        <table:table-row table:style-name="ro1">
          <table:table-cell office:value-type="float" office:value="96359" calcext:value-type="float">
            <text:p>96359</text:p>
          </table:table-cell>
          <table:table-cell office:value-type="float" office:value="40329" calcext:value-type="float">
            <text:p>40329</text:p>
          </table:table-cell>
        </table:table-row>
        <table:table-row table:style-name="ro1">
          <table:table-cell office:value-type="float" office:value="97477" calcext:value-type="float">
            <text:p>97477</text:p>
          </table:table-cell>
          <table:table-cell office:value-type="float" office:value="40329" calcext:value-type="float">
            <text:p>40329</text:p>
          </table:table-cell>
        </table:table-row>
        <table:table-row table:style-name="ro1">
          <table:table-cell office:value-type="float" office:value="97477" calcext:value-type="float">
            <text:p>97477</text:p>
          </table:table-cell>
          <table:table-cell office:value-type="float" office:value="41574" calcext:value-type="float">
            <text:p>41574</text:p>
          </table:table-cell>
        </table:table-row>
        <table:table-row table:style-name="ro1">
          <table:table-cell office:value-type="float" office:value="97485" calcext:value-type="float">
            <text:p>97485</text:p>
          </table:table-cell>
          <table:table-cell office:value-type="float" office:value="41574" calcext:value-type="float">
            <text:p>41574</text:p>
          </table:table-cell>
        </table:table-row>
        <table:table-row table:style-name="ro1">
          <table:table-cell office:value-type="float" office:value="97485" calcext:value-type="float">
            <text:p>97485</text:p>
          </table:table-cell>
          <table:table-cell office:value-type="float" office:value="42825" calcext:value-type="float">
            <text:p>42825</text:p>
          </table:table-cell>
        </table:table-row>
        <table:table-row table:style-name="ro1">
          <table:table-cell office:value-type="float" office:value="97382" calcext:value-type="float">
            <text:p>97382</text:p>
          </table:table-cell>
          <table:table-cell office:value-type="float" office:value="42825" calcext:value-type="float">
            <text:p>42825</text:p>
          </table:table-cell>
        </table:table-row>
        <table:table-row table:style-name="ro1">
          <table:table-cell office:value-type="float" office:value="97382" calcext:value-type="float">
            <text:p>97382</text:p>
          </table:table-cell>
          <table:table-cell office:value-type="float" office:value="44008" calcext:value-type="float">
            <text:p>44008</text:p>
          </table:table-cell>
        </table:table-row>
        <table:table-row table:style-name="ro1">
          <table:table-cell office:value-type="float" office:value="97709" calcext:value-type="float">
            <text:p>97709</text:p>
          </table:table-cell>
          <table:table-cell office:value-type="float" office:value="44008" calcext:value-type="float">
            <text:p>44008</text:p>
          </table:table-cell>
        </table:table-row>
        <table:table-row table:style-name="ro1">
          <table:table-cell office:value-type="float" office:value="97709" calcext:value-type="float">
            <text:p>97709</text:p>
          </table:table-cell>
          <table:table-cell office:value-type="float" office:value="45225" calcext:value-type="float">
            <text:p>45225</text:p>
          </table:table-cell>
        </table:table-row>
        <table:table-row table:style-name="ro1">
          <table:table-cell office:value-type="float" office:value="97772" calcext:value-type="float">
            <text:p>97772</text:p>
          </table:table-cell>
          <table:table-cell office:value-type="float" office:value="45225" calcext:value-type="float">
            <text:p>45225</text:p>
          </table:table-cell>
        </table:table-row>
        <table:table-row table:style-name="ro1">
          <table:table-cell office:value-type="float" office:value="97772" calcext:value-type="float">
            <text:p>97772</text:p>
          </table:table-cell>
          <table:table-cell office:value-type="float" office:value="46470" calcext:value-type="float">
            <text:p>46470</text:p>
          </table:table-cell>
        </table:table-row>
        <table:table-row table:style-name="ro1">
          <table:table-cell office:value-type="float" office:value="97433" calcext:value-type="float">
            <text:p>97433</text:p>
          </table:table-cell>
          <table:table-cell office:value-type="float" office:value="46470" calcext:value-type="float">
            <text:p>46470</text:p>
          </table:table-cell>
        </table:table-row>
        <table:table-row table:style-name="ro1">
          <table:table-cell office:value-type="float" office:value="97433" calcext:value-type="float">
            <text:p>97433</text:p>
          </table:table-cell>
          <table:table-cell office:value-type="float" office:value="47638" calcext:value-type="float">
            <text:p>47638</text:p>
          </table:table-cell>
        </table:table-row>
        <table:table-row table:style-name="ro1">
          <table:table-cell office:value-type="float" office:value="98228" calcext:value-type="float">
            <text:p>98228</text:p>
          </table:table-cell>
          <table:table-cell office:value-type="float" office:value="47638" calcext:value-type="float">
            <text:p>47638</text:p>
          </table:table-cell>
        </table:table-row>
        <table:table-row table:style-name="ro1">
          <table:table-cell office:value-type="float" office:value="98228" calcext:value-type="float">
            <text:p>98228</text:p>
          </table:table-cell>
          <table:table-cell office:value-type="float" office:value="48874" calcext:value-type="float">
            <text:p>48874</text:p>
          </table:table-cell>
        </table:table-row>
        <table:table-row table:style-name="ro1">
          <table:table-cell office:value-type="float" office:value="97697" calcext:value-type="float">
            <text:p>97697</text:p>
          </table:table-cell>
          <table:table-cell office:value-type="float" office:value="48874" calcext:value-type="float">
            <text:p>48874</text:p>
          </table:table-cell>
        </table:table-row>
        <table:table-row table:style-name="ro1">
          <table:table-cell office:value-type="float" office:value="97697" calcext:value-type="float">
            <text:p>97697</text:p>
          </table:table-cell>
          <table:table-cell office:value-type="float" office:value="50083" calcext:value-type="float">
            <text:p>50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22:27:58.466206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9T23:45:48.749284316</dc:date>
    <meta:editing-duration>PT7H56M22S</meta:editing-duration>
    <meta:editing-cycles>3</meta:editing-cycles>
    <meta:generator>LibreOffice/25.2.7.2$Linux_X86_64 LibreOffice_project/520$Build-2</meta:generator>
    <meta:document-statistic meta:table-count="1" meta:cell-count="9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2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bf0041" draw:fill-color="#bf0041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0000" draw:fill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6.254cm" svg:height="31.643cm" xlink:href=".." xlink:type="simple" chart:class="chart:scatter" chart:style-name="ch1">
        <chart:legend chart:legend-position="end" svg:x="53.342cm" svg:y="15.522cm" style:legend-expansion="high" chart:style-name="ch2"/>
        <chart:plot-area chart:style-name="ch3" svg:x="8.16cm" svg:y="1.102cm" svg:width="33.715cm" svg:height="31.857cm">
          <chart:coordinate-region svg:x="9.603cm" svg:y="1.302cm" svg:width="32.13cm" svg:height="30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put.B1:input.B496" chart:class="chart:scatter">
            <chart:domain table:cell-range-address="input.A1:input.A496"/>
            <chart:data-point chart:repeated="2"/>
            <chart:data-point chart:style-name="ch8"/>
            <chart:data-point chart:repeated="213"/>
            <chart:data-point chart:style-name="ch8"/>
            <chart:data-point/>
            <chart:data-point chart:style-name="ch9"/>
            <chart:data-point chart:repeated="29"/>
            <chart:data-point chart:style-name="ch10"/>
            <chart:data-point chart:style-name="ch8"/>
            <chart:data-point chart:repeated="26"/>
            <chart:data-point chart:style-name="ch8" chart:repeated="3"/>
            <chart:data-point chart:repeated="2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21">
                <text:p>98021</text:p>
                <draw:g>
                  <svg:desc>input.A1:input.A496</svg:desc>
                </draw:g>
              </table:table-cell>
              <table:table-cell office:value-type="float" office:value="50083">
                <text:p>50083</text:p>
                <draw:g>
                  <svg:desc>input.B1:input.B4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021">
                <text:p>98021</text:p>
              </table:table-cell>
              <table:table-cell office:value-type="float" office:value="51293">
                <text:p>51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775">
                <text:p>97775</text:p>
              </table:table-cell>
              <table:table-cell office:value-type="float" office:value="51293">
                <text:p>51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775">
                <text:p>97775</text:p>
              </table:table-cell>
              <table:table-cell office:value-type="float" office:value="52518">
                <text:p>52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000">
                <text:p>98000</text:p>
              </table:table-cell>
              <table:table-cell office:value-type="float" office:value="52518">
                <text:p>52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000">
                <text:p>98000</text:p>
              </table:table-cell>
              <table:table-cell office:value-type="float" office:value="53742">
                <text:p>53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35">
                <text:p>98035</text:p>
              </table:table-cell>
              <table:table-cell office:value-type="float" office:value="53742">
                <text:p>53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35">
                <text:p>98035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760">
                <text:p>97760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760">
                <text:p>97760</text:p>
              </table:table-cell>
              <table:table-cell office:value-type="float" office:value="56150">
                <text:p>56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28">
                <text:p>97628</text:p>
              </table:table-cell>
              <table:table-cell office:value-type="float" office:value="56150">
                <text:p>56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28">
                <text:p>97628</text:p>
              </table:table-cell>
              <table:table-cell office:value-type="float" office:value="57360">
                <text:p>57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495">
                <text:p>97495</text:p>
              </table:table-cell>
              <table:table-cell office:value-type="float" office:value="57360">
                <text:p>57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495">
                <text:p>97495</text:p>
              </table:table-cell>
              <table:table-cell office:value-type="float" office:value="58566">
                <text:p>58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321">
                <text:p>97321</text:p>
              </table:table-cell>
              <table:table-cell office:value-type="float" office:value="58566">
                <text:p>5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21">
                <text:p>97321</text:p>
              </table:table-cell>
              <table:table-cell office:value-type="float" office:value="59684">
                <text:p>59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713">
                <text:p>96713</text:p>
              </table:table-cell>
              <table:table-cell office:value-type="float" office:value="59684">
                <text:p>59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713">
                <text:p>96713</text:p>
              </table:table-cell>
              <table:table-cell office:value-type="float" office:value="60854">
                <text:p>60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409">
                <text:p>96409</text:p>
              </table:table-cell>
              <table:table-cell office:value-type="float" office:value="60854">
                <text:p>60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409">
                <text:p>96409</text:p>
              </table:table-cell>
              <table:table-cell office:value-type="float" office:value="62203">
                <text:p>62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796">
                <text:p>96796</text:p>
              </table:table-cell>
              <table:table-cell office:value-type="float" office:value="62203">
                <text:p>62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796">
                <text:p>96796</text:p>
              </table:table-cell>
              <table:table-cell office:value-type="float" office:value="63392">
                <text:p>63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497">
                <text:p>96497</text:p>
              </table:table-cell>
              <table:table-cell office:value-type="float" office:value="63392">
                <text:p>63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497">
                <text:p>96497</text:p>
              </table:table-cell>
              <table:table-cell office:value-type="float" office:value="64308">
                <text:p>64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329">
                <text:p>95329</text:p>
              </table:table-cell>
              <table:table-cell office:value-type="float" office:value="64308">
                <text:p>64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329">
                <text:p>95329</text:p>
              </table:table-cell>
              <table:table-cell office:value-type="float" office:value="65512">
                <text:p>65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27">
                <text:p>95127</text:p>
              </table:table-cell>
              <table:table-cell office:value-type="float" office:value="65512">
                <text:p>65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127">
                <text:p>95127</text:p>
              </table:table-cell>
              <table:table-cell office:value-type="float" office:value="66767">
                <text:p>66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34">
                <text:p>95034</text:p>
              </table:table-cell>
              <table:table-cell office:value-type="float" office:value="66767">
                <text:p>66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034">
                <text:p>95034</text:p>
              </table:table-cell>
              <table:table-cell office:value-type="float" office:value="67767">
                <text:p>67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256">
                <text:p>94256</text:p>
              </table:table-cell>
              <table:table-cell office:value-type="float" office:value="67767">
                <text:p>67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256">
                <text:p>94256</text:p>
              </table:table-cell>
              <table:table-cell office:value-type="float" office:value="69124">
                <text:p>69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351">
                <text:p>94351</text:p>
              </table:table-cell>
              <table:table-cell office:value-type="float" office:value="69124">
                <text:p>69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351">
                <text:p>94351</text:p>
              </table:table-cell>
              <table:table-cell office:value-type="float" office:value="69962">
                <text:p>6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248">
                <text:p>93248</text:p>
              </table:table-cell>
              <table:table-cell office:value-type="float" office:value="69962">
                <text:p>6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248">
                <text:p>93248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310">
                <text:p>933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310">
                <text:p>93310</text:p>
              </table:table-cell>
              <table:table-cell office:value-type="float" office:value="72279">
                <text:p>72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470">
                <text:p>92470</text:p>
              </table:table-cell>
              <table:table-cell office:value-type="float" office:value="72279">
                <text:p>72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470">
                <text:p>92470</text:p>
              </table:table-cell>
              <table:table-cell office:value-type="float" office:value="73224">
                <text:p>73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671">
                <text:p>91671</text:p>
              </table:table-cell>
              <table:table-cell office:value-type="float" office:value="73224">
                <text:p>73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671">
                <text:p>91671</text:p>
              </table:table-cell>
              <table:table-cell office:value-type="float" office:value="74468">
                <text:p>74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00">
                <text:p>91400</text:p>
              </table:table-cell>
              <table:table-cell office:value-type="float" office:value="74468">
                <text:p>74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400">
                <text:p>91400</text:p>
              </table:table-cell>
              <table:table-cell office:value-type="float" office:value="75616">
                <text:p>75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39">
                <text:p>90939</text:p>
              </table:table-cell>
              <table:table-cell office:value-type="float" office:value="75616">
                <text:p>75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939">
                <text:p>90939</text:p>
              </table:table-cell>
              <table:table-cell office:value-type="float" office:value="76644">
                <text:p>76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276">
                <text:p>90276</text:p>
              </table:table-cell>
              <table:table-cell office:value-type="float" office:value="76644">
                <text:p>76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276">
                <text:p>90276</text:p>
              </table:table-cell>
              <table:table-cell office:value-type="float" office:value="77311">
                <text:p>77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094">
                <text:p>89094</text:p>
              </table:table-cell>
              <table:table-cell office:value-type="float" office:value="77311">
                <text:p>773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094">
                <text:p>89094</text:p>
              </table:table-cell>
              <table:table-cell office:value-type="float" office:value="78582">
                <text:p>78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781">
                <text:p>88781</text:p>
              </table:table-cell>
              <table:table-cell office:value-type="float" office:value="78582">
                <text:p>78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781">
                <text:p>88781</text:p>
              </table:table-cell>
              <table:table-cell office:value-type="float" office:value="79337">
                <text:p>79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764">
                <text:p>87764</text:p>
              </table:table-cell>
              <table:table-cell office:value-type="float" office:value="79337">
                <text:p>7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764">
                <text:p>87764</text:p>
              </table:table-cell>
              <table:table-cell office:value-type="float" office:value="80182">
                <text:p>80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884">
                <text:p>86884</text:p>
              </table:table-cell>
              <table:table-cell office:value-type="float" office:value="80182">
                <text:p>80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884">
                <text:p>86884</text:p>
              </table:table-cell>
              <table:table-cell office:value-type="float" office:value="81425">
                <text:p>81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477">
                <text:p>86477</text:p>
              </table:table-cell>
              <table:table-cell office:value-type="float" office:value="81425">
                <text:p>81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477">
                <text:p>86477</text:p>
              </table:table-cell>
              <table:table-cell office:value-type="float" office:value="82392">
                <text:p>82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728">
                <text:p>85728</text:p>
              </table:table-cell>
              <table:table-cell office:value-type="float" office:value="82392">
                <text:p>82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728">
                <text:p>85728</text:p>
              </table:table-cell>
              <table:table-cell office:value-type="float" office:value="83140">
                <text:p>83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742">
                <text:p>84742</text:p>
              </table:table-cell>
              <table:table-cell office:value-type="float" office:value="83140">
                <text:p>83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742">
                <text:p>84742</text:p>
              </table:table-cell>
              <table:table-cell office:value-type="float" office:value="83749">
                <text:p>83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632">
                <text:p>83632</text:p>
              </table:table-cell>
              <table:table-cell office:value-type="float" office:value="83749">
                <text:p>837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632">
                <text:p>83632</text:p>
              </table:table-cell>
              <table:table-cell office:value-type="float" office:value="85195">
                <text:p>85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339">
                <text:p>83339</text:p>
              </table:table-cell>
              <table:table-cell office:value-type="float" office:value="85195">
                <text:p>85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339">
                <text:p>83339</text:p>
              </table:table-cell>
              <table:table-cell office:value-type="float" office:value="85864">
                <text:p>85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288">
                <text:p>82288</text:p>
              </table:table-cell>
              <table:table-cell office:value-type="float" office:value="85864">
                <text:p>85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288">
                <text:p>82288</text:p>
              </table:table-cell>
              <table:table-cell office:value-type="float" office:value="86834">
                <text:p>86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510">
                <text:p>81510</text:p>
              </table:table-cell>
              <table:table-cell office:value-type="float" office:value="86834">
                <text:p>86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510">
                <text:p>81510</text:p>
              </table:table-cell>
              <table:table-cell office:value-type="float" office:value="87592">
                <text:p>87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543">
                <text:p>80543</text:p>
              </table:table-cell>
              <table:table-cell office:value-type="float" office:value="87592">
                <text:p>87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543">
                <text:p>80543</text:p>
              </table:table-cell>
              <table:table-cell office:value-type="float" office:value="87695">
                <text:p>87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073">
                <text:p>79073</text:p>
              </table:table-cell>
              <table:table-cell office:value-type="float" office:value="87695">
                <text:p>876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73">
                <text:p>79073</text:p>
              </table:table-cell>
              <table:table-cell office:value-type="float" office:value="88845">
                <text:p>88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420">
                <text:p>78420</text:p>
              </table:table-cell>
              <table:table-cell office:value-type="float" office:value="88845">
                <text:p>88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420">
                <text:p>78420</text:p>
              </table:table-cell>
              <table:table-cell office:value-type="float" office:value="89119">
                <text:p>89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27">
                <text:p>77127</text:p>
              </table:table-cell>
              <table:table-cell office:value-type="float" office:value="89119">
                <text:p>89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27">
                <text:p>77127</text:p>
              </table:table-cell>
              <table:table-cell office:value-type="float" office:value="90384">
                <text:p>90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514">
                <text:p>76514</text:p>
              </table:table-cell>
              <table:table-cell office:value-type="float" office:value="90384">
                <text:p>90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14">
                <text:p>76514</text:p>
              </table:table-cell>
              <table:table-cell office:value-type="float" office:value="90398">
                <text:p>90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083">
                <text:p>75083</text:p>
              </table:table-cell>
              <table:table-cell office:value-type="float" office:value="90398">
                <text:p>90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083">
                <text:p>75083</text:p>
              </table:table-cell>
              <table:table-cell office:value-type="float" office:value="91469">
                <text:p>91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314">
                <text:p>74314</text:p>
              </table:table-cell>
              <table:table-cell office:value-type="float" office:value="91469">
                <text:p>91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314">
                <text:p>74314</text:p>
              </table:table-cell>
              <table:table-cell office:value-type="float" office:value="92401">
                <text:p>924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438">
                <text:p>73438</text:p>
              </table:table-cell>
              <table:table-cell office:value-type="float" office:value="92401">
                <text:p>92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438">
                <text:p>73438</text:p>
              </table:table-cell>
              <table:table-cell office:value-type="float" office:value="92259">
                <text:p>92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980">
                <text:p>71980</text:p>
              </table:table-cell>
              <table:table-cell office:value-type="float" office:value="92259">
                <text:p>92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980">
                <text:p>71980</text:p>
              </table:table-cell>
              <table:table-cell office:value-type="float" office:value="93015">
                <text:p>93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007">
                <text:p>71007</text:p>
              </table:table-cell>
              <table:table-cell office:value-type="float" office:value="93015">
                <text:p>93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007">
                <text:p>71007</text:p>
              </table:table-cell>
              <table:table-cell office:value-type="float" office:value="93573">
                <text:p>93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929">
                <text:p>69929</text:p>
              </table:table-cell>
              <table:table-cell office:value-type="float" office:value="93573">
                <text:p>93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929">
                <text:p>69929</text:p>
              </table:table-cell>
              <table:table-cell office:value-type="float" office:value="94069">
                <text:p>94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820">
                <text:p>68820</text:p>
              </table:table-cell>
              <table:table-cell office:value-type="float" office:value="94069">
                <text:p>94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820">
                <text:p>68820</text:p>
              </table:table-cell>
              <table:table-cell office:value-type="float" office:value="94500">
                <text:p>94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686">
                <text:p>67686</text:p>
              </table:table-cell>
              <table:table-cell office:value-type="float" office:value="94500">
                <text:p>94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686">
                <text:p>67686</text:p>
              </table:table-cell>
              <table:table-cell office:value-type="float" office:value="95038">
                <text:p>95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591">
                <text:p>66591</text:p>
              </table:table-cell>
              <table:table-cell office:value-type="float" office:value="95038">
                <text:p>95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591">
                <text:p>66591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359">
                <text:p>65359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359">
                <text:p>65359</text:p>
              </table:table-cell>
              <table:table-cell office:value-type="float" office:value="96122">
                <text:p>96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82">
                <text:p>64382</text:p>
              </table:table-cell>
              <table:table-cell office:value-type="float" office:value="96122">
                <text:p>96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382">
                <text:p>64382</text:p>
              </table:table-cell>
              <table:table-cell office:value-type="float" office:value="95798">
                <text:p>957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018">
                <text:p>63018</text:p>
              </table:table-cell>
              <table:table-cell office:value-type="float" office:value="95798">
                <text:p>95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018">
                <text:p>63018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885">
                <text:p>61885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885">
                <text:p>61885</text:p>
              </table:table-cell>
              <table:table-cell office:value-type="float" office:value="97114">
                <text:p>97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846">
                <text:p>60846</text:p>
              </table:table-cell>
              <table:table-cell office:value-type="float" office:value="97114">
                <text:p>97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846">
                <text:p>60846</text:p>
              </table:table-cell>
              <table:table-cell office:value-type="float" office:value="96593">
                <text:p>96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490">
                <text:p>59490</text:p>
              </table:table-cell>
              <table:table-cell office:value-type="float" office:value="96593">
                <text:p>96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490">
                <text:p>59490</text:p>
              </table:table-cell>
              <table:table-cell office:value-type="float" office:value="96963">
                <text:p>96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333">
                <text:p>58333</text:p>
              </table:table-cell>
              <table:table-cell office:value-type="float" office:value="96963">
                <text:p>96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333">
                <text:p>58333</text:p>
              </table:table-cell>
              <table:table-cell office:value-type="float" office:value="97817">
                <text:p>978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240">
                <text:p>57240</text:p>
              </table:table-cell>
              <table:table-cell office:value-type="float" office:value="97817">
                <text:p>97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240">
                <text:p>57240</text:p>
              </table:table-cell>
              <table:table-cell office:value-type="float" office:value="97323">
                <text:p>97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943">
                <text:p>55943</text:p>
              </table:table-cell>
              <table:table-cell office:value-type="float" office:value="97323">
                <text:p>97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943">
                <text:p>55943</text:p>
              </table:table-cell>
              <table:table-cell office:value-type="float" office:value="97753">
                <text:p>97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772">
                <text:p>54772</text:p>
              </table:table-cell>
              <table:table-cell office:value-type="float" office:value="97753">
                <text:p>97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772">
                <text:p>54772</text:p>
              </table:table-cell>
              <table:table-cell office:value-type="float" office:value="97882">
                <text:p>97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2">
                <text:p>53562</text:p>
              </table:table-cell>
              <table:table-cell office:value-type="float" office:value="97882">
                <text:p>97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562">
                <text:p>53562</text:p>
              </table:table-cell>
              <table:table-cell office:value-type="float" office:value="97681">
                <text:p>97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334">
                <text:p>52334</text:p>
              </table:table-cell>
              <table:table-cell office:value-type="float" office:value="97681">
                <text:p>97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334">
                <text:p>52334</text:p>
              </table:table-cell>
              <table:table-cell office:value-type="float" office:value="98234">
                <text:p>982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138">
                <text:p>51138</text:p>
              </table:table-cell>
              <table:table-cell office:value-type="float" office:value="98234">
                <text:p>98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138">
                <text:p>51138</text:p>
              </table:table-cell>
              <table:table-cell office:value-type="float" office:value="98140">
                <text:p>981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916">
                <text:p>49916</text:p>
              </table:table-cell>
              <table:table-cell office:value-type="float" office:value="98140">
                <text:p>981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916">
                <text:p>49916</text:p>
              </table:table-cell>
              <table:table-cell office:value-type="float" office:value="97985">
                <text:p>979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700">
                <text:p>48700</text:p>
              </table:table-cell>
              <table:table-cell office:value-type="float" office:value="97985">
                <text:p>97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700">
                <text:p>48700</text:p>
              </table:table-cell>
              <table:table-cell office:value-type="float" office:value="97861">
                <text:p>978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489">
                <text:p>47489</text:p>
              </table:table-cell>
              <table:table-cell office:value-type="float" office:value="97861">
                <text:p>97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489">
                <text:p>47489</text:p>
              </table:table-cell>
              <table:table-cell office:value-type="float" office:value="98225">
                <text:p>98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243">
                <text:p>46243</text:p>
              </table:table-cell>
              <table:table-cell office:value-type="float" office:value="98225">
                <text:p>98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243">
                <text:p>46243</text:p>
              </table:table-cell>
              <table:table-cell office:value-type="float" office:value="97530">
                <text:p>975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083">
                <text:p>45083</text:p>
              </table:table-cell>
              <table:table-cell office:value-type="float" office:value="97530">
                <text:p>975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83">
                <text:p>45083</text:p>
              </table:table-cell>
              <table:table-cell office:value-type="float" office:value="97603">
                <text:p>97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853">
                <text:p>43853</text:p>
              </table:table-cell>
              <table:table-cell office:value-type="float" office:value="97603">
                <text:p>976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853">
                <text:p>43853</text:p>
              </table:table-cell>
              <table:table-cell office:value-type="float" office:value="97064">
                <text:p>970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706">
                <text:p>42706</text:p>
              </table:table-cell>
              <table:table-cell office:value-type="float" office:value="97064">
                <text:p>97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706">
                <text:p>42706</text:p>
              </table:table-cell>
              <table:table-cell office:value-type="float" office:value="97243">
                <text:p>97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447">
                <text:p>41447</text:p>
              </table:table-cell>
              <table:table-cell office:value-type="float" office:value="97243">
                <text:p>9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447">
                <text:p>41447</text:p>
              </table:table-cell>
              <table:table-cell office:value-type="float" office:value="96639">
                <text:p>966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330">
                <text:p>40330</text:p>
              </table:table-cell>
              <table:table-cell office:value-type="float" office:value="96639">
                <text:p>96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330">
                <text:p>40330</text:p>
              </table:table-cell>
              <table:table-cell office:value-type="float" office:value="97028">
                <text:p>97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000">
                <text:p>39000</text:p>
              </table:table-cell>
              <table:table-cell office:value-type="float" office:value="97028">
                <text:p>97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000">
                <text:p>39000</text:p>
              </table:table-cell>
              <table:table-cell office:value-type="float" office:value="96182">
                <text:p>96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956">
                <text:p>37956</text:p>
              </table:table-cell>
              <table:table-cell office:value-type="float" office:value="96182">
                <text:p>96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956">
                <text:p>37956</text:p>
              </table:table-cell>
              <table:table-cell office:value-type="float" office:value="95771">
                <text:p>957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816">
                <text:p>36816</text:p>
              </table:table-cell>
              <table:table-cell office:value-type="float" office:value="95771">
                <text:p>957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816">
                <text:p>36816</text:p>
              </table:table-cell>
              <table:table-cell office:value-type="float" office:value="96061">
                <text:p>960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460">
                <text:p>35460</text:p>
              </table:table-cell>
              <table:table-cell office:value-type="float" office:value="96061">
                <text:p>96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460">
                <text:p>35460</text:p>
              </table:table-cell>
              <table:table-cell office:value-type="float" office:value="95194">
                <text:p>95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464">
                <text:p>34464</text:p>
              </table:table-cell>
              <table:table-cell office:value-type="float" office:value="95194">
                <text:p>951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464">
                <text:p>34464</text:p>
              </table:table-cell>
              <table:table-cell office:value-type="float" office:value="94669">
                <text:p>94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367">
                <text:p>33367</text:p>
              </table:table-cell>
              <table:table-cell office:value-type="float" office:value="94669">
                <text:p>94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367">
                <text:p>33367</text:p>
              </table:table-cell>
              <table:table-cell office:value-type="float" office:value="94176">
                <text:p>94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264">
                <text:p>32264</text:p>
              </table:table-cell>
              <table:table-cell office:value-type="float" office:value="94176">
                <text:p>94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264">
                <text:p>32264</text:p>
              </table:table-cell>
              <table:table-cell office:value-type="float" office:value="94261">
                <text:p>942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914">
                <text:p>30914</text:p>
              </table:table-cell>
              <table:table-cell office:value-type="float" office:value="94261">
                <text:p>94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14">
                <text:p>30914</text:p>
              </table:table-cell>
              <table:table-cell office:value-type="float" office:value="93626">
                <text:p>93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862">
                <text:p>29862</text:p>
              </table:table-cell>
              <table:table-cell office:value-type="float" office:value="93626">
                <text:p>93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862">
                <text:p>29862</text:p>
              </table:table-cell>
              <table:table-cell office:value-type="float" office:value="93349">
                <text:p>93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642">
                <text:p>28642</text:p>
              </table:table-cell>
              <table:table-cell office:value-type="float" office:value="93349">
                <text:p>93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642">
                <text:p>28642</text:p>
              </table:table-cell>
              <table:table-cell office:value-type="float" office:value="92466">
                <text:p>92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723">
                <text:p>27723</text:p>
              </table:table-cell>
              <table:table-cell office:value-type="float" office:value="92466">
                <text:p>92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23">
                <text:p>27723</text:p>
              </table:table-cell>
              <table:table-cell office:value-type="float" office:value="91923">
                <text:p>919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34">
                <text:p>26634</text:p>
              </table:table-cell>
              <table:table-cell office:value-type="float" office:value="91923">
                <text:p>919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634">
                <text:p>26634</text:p>
              </table:table-cell>
              <table:table-cell office:value-type="float" office:value="91142">
                <text:p>91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684">
                <text:p>25684</text:p>
              </table:table-cell>
              <table:table-cell office:value-type="float" office:value="91142">
                <text:p>91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684">
                <text:p>25684</text:p>
              </table:table-cell>
              <table:table-cell office:value-type="float" office:value="90284">
                <text:p>90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792">
                <text:p>24792</text:p>
              </table:table-cell>
              <table:table-cell office:value-type="float" office:value="90284">
                <text:p>90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792">
                <text:p>24792</text:p>
              </table:table-cell>
              <table:table-cell office:value-type="float" office:value="89649">
                <text:p>89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769">
                <text:p>23769</text:p>
              </table:table-cell>
              <table:table-cell office:value-type="float" office:value="89649">
                <text:p>89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769">
                <text:p>23769</text:p>
              </table:table-cell>
              <table:table-cell office:value-type="float" office:value="89044">
                <text:p>890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723">
                <text:p>22723</text:p>
              </table:table-cell>
              <table:table-cell office:value-type="float" office:value="89044">
                <text:p>890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723">
                <text:p>22723</text:p>
              </table:table-cell>
              <table:table-cell office:value-type="float" office:value="89033">
                <text:p>890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232">
                <text:p>21232</text:p>
              </table:table-cell>
              <table:table-cell office:value-type="float" office:value="89033">
                <text:p>890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232">
                <text:p>21232</text:p>
              </table:table-cell>
              <table:table-cell office:value-type="float" office:value="87870">
                <text:p>878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80">
                <text:p>20580</text:p>
              </table:table-cell>
              <table:table-cell office:value-type="float" office:value="87870">
                <text:p>878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80">
                <text:p>20580</text:p>
              </table:table-cell>
              <table:table-cell office:value-type="float" office:value="86768">
                <text:p>86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12">
                <text:p>19912</text:p>
              </table:table-cell>
              <table:table-cell office:value-type="float" office:value="86768">
                <text:p>8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12">
                <text:p>19912</text:p>
              </table:table-cell>
              <table:table-cell office:value-type="float" office:value="86556">
                <text:p>86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06">
                <text:p>18506</text:p>
              </table:table-cell>
              <table:table-cell office:value-type="float" office:value="86556">
                <text:p>86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06">
                <text:p>18506</text:p>
              </table:table-cell>
              <table:table-cell office:value-type="float" office:value="85786">
                <text:p>857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555">
                <text:p>17555</text:p>
              </table:table-cell>
              <table:table-cell office:value-type="float" office:value="85786">
                <text:p>857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55">
                <text:p>17555</text:p>
              </table:table-cell>
              <table:table-cell office:value-type="float" office:value="84873">
                <text:p>848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734">
                <text:p>16734</text:p>
              </table:table-cell>
              <table:table-cell office:value-type="float" office:value="84873">
                <text:p>84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34">
                <text:p>16734</text:p>
              </table:table-cell>
              <table:table-cell office:value-type="float" office:value="83642">
                <text:p>83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39">
                <text:p>16239</text:p>
              </table:table-cell>
              <table:table-cell office:value-type="float" office:value="83642">
                <text:p>836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239">
                <text:p>16239</text:p>
              </table:table-cell>
              <table:table-cell office:value-type="float" office:value="82803">
                <text:p>828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370">
                <text:p>15370</text:p>
              </table:table-cell>
              <table:table-cell office:value-type="float" office:value="82803">
                <text:p>82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370">
                <text:p>15370</text:p>
              </table:table-cell>
              <table:table-cell office:value-type="float" office:value="81915">
                <text:p>819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550">
                <text:p>14550</text:p>
              </table:table-cell>
              <table:table-cell office:value-type="float" office:value="81915">
                <text:p>81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550">
                <text:p>14550</text:p>
              </table:table-cell>
              <table:table-cell office:value-type="float" office:value="81502">
                <text:p>815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174">
                <text:p>13174</text:p>
              </table:table-cell>
              <table:table-cell office:value-type="float" office:value="81502">
                <text:p>815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174">
                <text:p>13174</text:p>
              </table:table-cell>
              <table:table-cell office:value-type="float" office:value="80154">
                <text:p>80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86">
                <text:p>12886</text:p>
              </table:table-cell>
              <table:table-cell office:value-type="float" office:value="80154">
                <text:p>80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86">
                <text:p>12886</text:p>
              </table:table-cell>
              <table:table-cell office:value-type="float" office:value="79241">
                <text:p>792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87">
                <text:p>12087</text:p>
              </table:table-cell>
              <table:table-cell office:value-type="float" office:value="79241">
                <text:p>79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87">
                <text:p>12087</text:p>
              </table:table-cell>
              <table:table-cell office:value-type="float" office:value="78154">
                <text:p>781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518">
                <text:p>11518</text:p>
              </table:table-cell>
              <table:table-cell office:value-type="float" office:value="78154">
                <text:p>781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18">
                <text:p>11518</text:p>
              </table:table-cell>
              <table:table-cell office:value-type="float" office:value="77247">
                <text:p>77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706">
                <text:p>10706</text:p>
              </table:table-cell>
              <table:table-cell office:value-type="float" office:value="77247">
                <text:p>772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706">
                <text:p>10706</text:p>
              </table:table-cell>
              <table:table-cell office:value-type="float" office:value="76344">
                <text:p>763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74">
                <text:p>9874</text:p>
              </table:table-cell>
              <table:table-cell office:value-type="float" office:value="76344">
                <text:p>763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874">
                <text:p>9874</text:p>
              </table:table-cell>
              <table:table-cell office:value-type="float" office:value="75474">
                <text:p>754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71">
                <text:p>8971</text:p>
              </table:table-cell>
              <table:table-cell office:value-type="float" office:value="75474">
                <text:p>754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71">
                <text:p>8971</text:p>
              </table:table-cell>
              <table:table-cell office:value-type="float" office:value="74432">
                <text:p>744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29">
                <text:p>8329</text:p>
              </table:table-cell>
              <table:table-cell office:value-type="float" office:value="74432">
                <text:p>744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29">
                <text:p>8329</text:p>
              </table:table-cell>
              <table:table-cell office:value-type="float" office:value="73056">
                <text:p>73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89">
                <text:p>8289</text:p>
              </table:table-cell>
              <table:table-cell office:value-type="float" office:value="73056">
                <text:p>73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289">
                <text:p>8289</text:p>
              </table:table-cell>
              <table:table-cell office:value-type="float" office:value="71924">
                <text:p>719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49">
                <text:p>7849</text:p>
              </table:table-cell>
              <table:table-cell office:value-type="float" office:value="71924">
                <text:p>719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49">
                <text:p>7849</text:p>
              </table:table-cell>
              <table:table-cell office:value-type="float" office:value="71136">
                <text:p>711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20">
                <text:p>6720</text:p>
              </table:table-cell>
              <table:table-cell office:value-type="float" office:value="71136">
                <text:p>711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20">
                <text:p>6720</text:p>
              </table:table-cell>
              <table:table-cell office:value-type="float" office:value="70084">
                <text:p>7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85">
                <text:p>6085</text:p>
              </table:table-cell>
              <table:table-cell office:value-type="float" office:value="70084">
                <text:p>70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85">
                <text:p>6085</text:p>
              </table:table-cell>
              <table:table-cell office:value-type="float" office:value="68943">
                <text:p>68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42">
                <text:p>5642</text:p>
              </table:table-cell>
              <table:table-cell office:value-type="float" office:value="68943">
                <text:p>689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42">
                <text:p>5642</text:p>
              </table:table-cell>
              <table:table-cell office:value-type="float" office:value="67626">
                <text:p>676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49">
                <text:p>5649</text:p>
              </table:table-cell>
              <table:table-cell office:value-type="float" office:value="67626">
                <text:p>67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49">
                <text:p>5649</text:p>
              </table:table-cell>
              <table:table-cell office:value-type="float" office:value="66511">
                <text:p>665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78">
                <text:p>5178</text:p>
              </table:table-cell>
              <table:table-cell office:value-type="float" office:value="66511">
                <text:p>66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78">
                <text:p>5178</text:p>
              </table:table-cell>
              <table:table-cell office:value-type="float" office:value="65295">
                <text:p>652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96">
                <text:p>4996</text:p>
              </table:table-cell>
              <table:table-cell office:value-type="float" office:value="65295">
                <text:p>65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96">
                <text:p>4996</text:p>
              </table:table-cell>
              <table:table-cell office:value-type="float" office:value="64323">
                <text:p>643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69">
                <text:p>4069</text:p>
              </table:table-cell>
              <table:table-cell office:value-type="float" office:value="64323">
                <text:p>64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69">
                <text:p>4069</text:p>
              </table:table-cell>
              <table:table-cell office:value-type="float" office:value="63210">
                <text:p>632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25">
                <text:p>3525</text:p>
              </table:table-cell>
              <table:table-cell office:value-type="float" office:value="63210">
                <text:p>632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25">
                <text:p>3525</text:p>
              </table:table-cell>
              <table:table-cell office:value-type="float" office:value="61847">
                <text:p>61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11">
                <text:p>3911</text:p>
              </table:table-cell>
              <table:table-cell office:value-type="float" office:value="61847">
                <text:p>618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11">
                <text:p>3911</text:p>
              </table:table-cell>
              <table:table-cell office:value-type="float" office:value="60830">
                <text:p>608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56">
                <text:p>2956</text:p>
              </table:table-cell>
              <table:table-cell office:value-type="float" office:value="60830">
                <text:p>608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56">
                <text:p>2956</text:p>
              </table:table-cell>
              <table:table-cell office:value-type="float" office:value="59645">
                <text:p>596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8">
                <text:p>2648</text:p>
              </table:table-cell>
              <table:table-cell office:value-type="float" office:value="59645">
                <text:p>596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48">
                <text:p>2648</text:p>
              </table:table-cell>
              <table:table-cell office:value-type="float" office:value="58357">
                <text:p>583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98">
                <text:p>2898</text:p>
              </table:table-cell>
              <table:table-cell office:value-type="float" office:value="58357">
                <text:p>583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98">
                <text:p>2898</text:p>
              </table:table-cell>
              <table:table-cell office:value-type="float" office:value="57232">
                <text:p>572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33">
                <text:p>2233</text:p>
              </table:table-cell>
              <table:table-cell office:value-type="float" office:value="57232">
                <text:p>57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33">
                <text:p>2233</text:p>
              </table:table-cell>
              <table:table-cell office:value-type="float" office:value="56011">
                <text:p>560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31">
                <text:p>2131</text:p>
              </table:table-cell>
              <table:table-cell office:value-type="float" office:value="56011">
                <text:p>560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31">
                <text:p>2131</text:p>
              </table:table-cell>
              <table:table-cell office:value-type="float" office:value="54780">
                <text:p>547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0">
                <text:p>2160</text:p>
              </table:table-cell>
              <table:table-cell office:value-type="float" office:value="54780">
                <text:p>547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0">
                <text:p>2160</text:p>
              </table:table-cell>
              <table:table-cell office:value-type="float" office:value="53538">
                <text:p>535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7">
                <text:p>2447</text:p>
              </table:table-cell>
              <table:table-cell office:value-type="float" office:value="53538">
                <text:p>535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7">
                <text:p>2447</text:p>
              </table:table-cell>
              <table:table-cell office:value-type="float" office:value="52332">
                <text:p>523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59">
                <text:p>2359</text:p>
              </table:table-cell>
              <table:table-cell office:value-type="float" office:value="52332">
                <text:p>523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59">
                <text:p>2359</text:p>
              </table:table-cell>
              <table:table-cell office:value-type="float" office:value="51144">
                <text:p>51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22">
                <text:p>1522</text:p>
              </table:table-cell>
              <table:table-cell office:value-type="float" office:value="51144">
                <text:p>51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22">
                <text:p>1522</text:p>
              </table:table-cell>
              <table:table-cell office:value-type="float" office:value="50077">
                <text:p>500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564">
                <text:p>94564</text:p>
              </table:table-cell>
              <table:table-cell office:value-type="float" office:value="50077">
                <text:p>500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564">
                <text:p>94564</text:p>
              </table:table-cell>
              <table:table-cell office:value-type="float" office:value="48699">
                <text:p>48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5">
                <text:p>1975</text:p>
              </table:table-cell>
              <table:table-cell office:value-type="float" office:value="48699">
                <text:p>486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5">
                <text:p>1975</text:p>
              </table:table-cell>
              <table:table-cell office:value-type="float" office:value="47491">
                <text:p>474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87">
                <text:p>2187</text:p>
              </table:table-cell>
              <table:table-cell office:value-type="float" office:value="47491">
                <text:p>474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87">
                <text:p>2187</text:p>
              </table:table-cell>
              <table:table-cell office:value-type="float" office:value="46248">
                <text:p>46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44">
                <text:p>1844</text:p>
              </table:table-cell>
              <table:table-cell office:value-type="float" office:value="46248">
                <text:p>46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44">
                <text:p>1844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49">
                <text:p>1949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49">
                <text:p>1949</text:p>
              </table:table-cell>
              <table:table-cell office:value-type="float" office:value="43897">
                <text:p>438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39">
                <text:p>2739</text:p>
              </table:table-cell>
              <table:table-cell office:value-type="float" office:value="43897">
                <text:p>438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39">
                <text:p>2739</text:p>
              </table:table-cell>
              <table:table-cell office:value-type="float" office:value="42591">
                <text:p>425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94">
                <text:p>2194</text:p>
              </table:table-cell>
              <table:table-cell office:value-type="float" office:value="42591">
                <text:p>42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94">
                <text:p>2194</text:p>
              </table:table-cell>
              <table:table-cell office:value-type="float" office:value="41374">
                <text:p>41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54">
                <text:p>2354</text:p>
              </table:table-cell>
              <table:table-cell office:value-type="float" office:value="41374">
                <text:p>413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54">
                <text:p>2354</text:p>
              </table:table-cell>
              <table:table-cell office:value-type="float" office:value="40287">
                <text:p>402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51">
                <text:p>3151</text:p>
              </table:table-cell>
              <table:table-cell office:value-type="float" office:value="40287">
                <text:p>402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1">
                <text:p>3151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2">
                <text:p>3622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22">
                <text:p>3622</text:p>
              </table:table-cell>
              <table:table-cell office:value-type="float" office:value="37933">
                <text:p>379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27">
                <text:p>3727</text:p>
              </table:table-cell>
              <table:table-cell office:value-type="float" office:value="37933">
                <text:p>379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27">
                <text:p>3727</text:p>
              </table:table-cell>
              <table:table-cell office:value-type="float" office:value="36808">
                <text:p>368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97">
                <text:p>4197</text:p>
              </table:table-cell>
              <table:table-cell office:value-type="float" office:value="36808">
                <text:p>368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97">
                <text:p>4197</text:p>
              </table:table-cell>
              <table:table-cell office:value-type="float" office:value="35435">
                <text:p>354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61">
                <text:p>3861</text:p>
              </table:table-cell>
              <table:table-cell office:value-type="float" office:value="35435">
                <text:p>354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61">
                <text:p>3861</text:p>
              </table:table-cell>
              <table:table-cell office:value-type="float" office:value="34278">
                <text:p>342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65">
                <text:p>4265</text:p>
              </table:table-cell>
              <table:table-cell office:value-type="float" office:value="34278">
                <text:p>34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5">
                <text:p>4265</text:p>
              </table:table-cell>
              <table:table-cell office:value-type="float" office:value="33344">
                <text:p>333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67">
                <text:p>5267</text:p>
              </table:table-cell>
              <table:table-cell office:value-type="float" office:value="33344">
                <text:p>333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67">
                <text:p>5267</text:p>
              </table:table-cell>
              <table:table-cell office:value-type="float" office:value="32241">
                <text:p>322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65">
                <text:p>5765</text:p>
              </table:table-cell>
              <table:table-cell office:value-type="float" office:value="32241">
                <text:p>32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65">
                <text:p>5765</text:p>
              </table:table-cell>
              <table:table-cell office:value-type="float" office:value="30972">
                <text:p>309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72">
                <text:p>5872</text:p>
              </table:table-cell>
              <table:table-cell office:value-type="float" office:value="30972">
                <text:p>309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72">
                <text:p>5872</text:p>
              </table:table-cell>
              <table:table-cell office:value-type="float" office:value="29684">
                <text:p>296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7">
                <text:p>5987</text:p>
              </table:table-cell>
              <table:table-cell office:value-type="float" office:value="29684">
                <text:p>296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87">
                <text:p>5987</text:p>
              </table:table-cell>
              <table:table-cell office:value-type="float" office:value="28831">
                <text:p>288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33">
                <text:p>7033</text:p>
              </table:table-cell>
              <table:table-cell office:value-type="float" office:value="28831">
                <text:p>288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33">
                <text:p>7033</text:p>
              </table:table-cell>
              <table:table-cell office:value-type="float" office:value="27618">
                <text:p>276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33">
                <text:p>7333</text:p>
              </table:table-cell>
              <table:table-cell office:value-type="float" office:value="27618">
                <text:p>276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33">
                <text:p>7333</text:p>
              </table:table-cell>
              <table:table-cell office:value-type="float" office:value="26782">
                <text:p>267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41">
                <text:p>8341</text:p>
              </table:table-cell>
              <table:table-cell office:value-type="float" office:value="26782">
                <text:p>267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41">
                <text:p>8341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71">
                <text:p>8471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471">
                <text:p>8471</text:p>
              </table:table-cell>
              <table:table-cell office:value-type="float" office:value="24742">
                <text:p>247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34">
                <text:p>9634</text:p>
              </table:table-cell>
              <table:table-cell office:value-type="float" office:value="24742">
                <text:p>247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34">
                <text:p>9634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55">
                <text:p>9755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755">
                <text:p>9755</text:p>
              </table:table-cell>
              <table:table-cell office:value-type="float" office:value="22709">
                <text:p>22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935">
                <text:p>10935</text:p>
              </table:table-cell>
              <table:table-cell office:value-type="float" office:value="22709">
                <text:p>227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935">
                <text:p>10935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703">
                <text:p>11703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703">
                <text:p>11703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984">
                <text:p>1198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84">
                <text:p>11984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64">
                <text:p>13064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64">
                <text:p>1306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322">
                <text:p>1332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22">
                <text:p>13322</text:p>
              </table:table-cell>
              <table:table-cell office:value-type="float" office:value="17670">
                <text:p>176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341">
                <text:p>14341</text:p>
              </table:table-cell>
              <table:table-cell office:value-type="float" office:value="17670">
                <text:p>176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341">
                <text:p>14341</text:p>
              </table:table-cell>
              <table:table-cell office:value-type="float" office:value="17191">
                <text:p>171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605">
                <text:p>15605</text:p>
              </table:table-cell>
              <table:table-cell office:value-type="float" office:value="17191">
                <text:p>171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05">
                <text:p>15605</text:p>
              </table:table-cell>
              <table:table-cell office:value-type="float" office:value="16081">
                <text:p>160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199">
                <text:p>16199</text:p>
              </table:table-cell>
              <table:table-cell office:value-type="float" office:value="16081">
                <text:p>160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199">
                <text:p>16199</text:p>
              </table:table-cell>
              <table:table-cell office:value-type="float" office:value="15443">
                <text:p>154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266">
                <text:p>17266</text:p>
              </table:table-cell>
              <table:table-cell office:value-type="float" office:value="15443">
                <text:p>15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266">
                <text:p>17266</text:p>
              </table:table-cell>
              <table:table-cell office:value-type="float" office:value="14038">
                <text:p>140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623">
                <text:p>17623</text:p>
              </table:table-cell>
              <table:table-cell office:value-type="float" office:value="14038">
                <text:p>140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623">
                <text:p>17623</text:p>
              </table:table-cell>
              <table:table-cell office:value-type="float" office:value="13674">
                <text:p>136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925">
                <text:p>18925</text:p>
              </table:table-cell>
              <table:table-cell office:value-type="float" office:value="13674">
                <text:p>136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925">
                <text:p>18925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774">
                <text:p>19774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774">
                <text:p>19774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603">
                <text:p>20603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603">
                <text:p>20603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639">
                <text:p>21639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639">
                <text:p>21639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556">
                <text:p>22556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556">
                <text:p>22556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920">
                <text:p>23920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920">
                <text:p>23920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558">
                <text:p>24558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558">
                <text:p>24558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554">
                <text:p>25554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554">
                <text:p>25554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741">
                <text:p>26741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41">
                <text:p>26741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788">
                <text:p>27788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788">
                <text:p>27788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059">
                <text:p>29059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059">
                <text:p>29059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103">
                <text:p>30103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103">
                <text:p>30103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281">
                <text:p>31281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281">
                <text:p>31281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374">
                <text:p>32374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374">
                <text:p>32374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523">
                <text:p>33523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523">
                <text:p>33523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75">
                <text:p>34675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75">
                <text:p>34675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581">
                <text:p>35581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581">
                <text:p>35581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11">
                <text:p>36911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911">
                <text:p>36911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928">
                <text:p>37928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928">
                <text:p>37928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322">
                <text:p>39322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322">
                <text:p>3932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322">
                <text:p>4032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322">
                <text:p>4032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529">
                <text:p>4152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529">
                <text:p>41529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784">
                <text:p>42784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784">
                <text:p>42784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053">
                <text:p>44053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053">
                <text:p>44053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242">
                <text:p>45242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242">
                <text:p>45242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407">
                <text:p>46407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407">
                <text:p>46407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666">
                <text:p>47666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666">
                <text:p>4766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861">
                <text:p>4886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861">
                <text:p>4886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083">
                <text:p>5008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0083">
                <text:p>5008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297">
                <text:p>5129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297">
                <text:p>5129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496">
                <text:p>5249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496">
                <text:p>5249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704">
                <text:p>5370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704">
                <text:p>53704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893">
                <text:p>54893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893">
                <text:p>5489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164">
                <text:p>5616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164">
                <text:p>56164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286">
                <text:p>57286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286">
                <text:p>5728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597">
                <text:p>58597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597">
                <text:p>5859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842">
                <text:p>5984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842">
                <text:p>5984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995">
                <text:p>60995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995">
                <text:p>60995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099">
                <text:p>62099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099">
                <text:p>62099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386">
                <text:p>63386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386">
                <text:p>63386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441">
                <text:p>64441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441">
                <text:p>64441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519">
                <text:p>65519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519">
                <text:p>65519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579">
                <text:p>66579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579">
                <text:p>6657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922">
                <text:p>67922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922">
                <text:p>67922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9019">
                <text:p>69019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019">
                <text:p>69019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024">
                <text:p>70024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024">
                <text:p>70024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1049">
                <text:p>71049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049">
                <text:p>71049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456">
                <text:p>72456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2456">
                <text:p>72456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199">
                <text:p>73199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199">
                <text:p>73199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258">
                <text:p>74258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258">
                <text:p>74258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647">
                <text:p>75647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5647">
                <text:p>75647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431">
                <text:p>76431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431">
                <text:p>76431</text:p>
              </table:table-cell>
              <table:table-cell office:value-type="float" office:value="10371">
                <text:p>103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684">
                <text:p>77684</text:p>
              </table:table-cell>
              <table:table-cell office:value-type="float" office:value="10371">
                <text:p>103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684">
                <text:p>77684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280">
                <text:p>78280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280">
                <text:p>78280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366">
                <text:p>79366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366">
                <text:p>79366</text:p>
              </table:table-cell>
              <table:table-cell office:value-type="float" office:value="13138">
                <text:p>131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163">
                <text:p>80163</text:p>
              </table:table-cell>
              <table:table-cell office:value-type="float" office:value="13138">
                <text:p>131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0163">
                <text:p>80163</text:p>
              </table:table-cell>
              <table:table-cell office:value-type="float" office:value="13575">
                <text:p>135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1379">
                <text:p>81379</text:p>
              </table:table-cell>
              <table:table-cell office:value-type="float" office:value="13575">
                <text:p>135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1379">
                <text:p>81379</text:p>
              </table:table-cell>
              <table:table-cell office:value-type="float" office:value="14747">
                <text:p>147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960">
                <text:p>81960</text:p>
              </table:table-cell>
              <table:table-cell office:value-type="float" office:value="14747">
                <text:p>147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1960">
                <text:p>81960</text:p>
              </table:table-cell>
              <table:table-cell office:value-type="float" office:value="15417">
                <text:p>154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2988">
                <text:p>82988</text:p>
              </table:table-cell>
              <table:table-cell office:value-type="float" office:value="15417">
                <text:p>154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2988">
                <text:p>82988</text:p>
              </table:table-cell>
              <table:table-cell office:value-type="float" office:value="15786">
                <text:p>157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332">
                <text:p>84332</text:p>
              </table:table-cell>
              <table:table-cell office:value-type="float" office:value="15786">
                <text:p>157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332">
                <text:p>84332</text:p>
              </table:table-cell>
              <table:table-cell office:value-type="float" office:value="17102">
                <text:p>171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729">
                <text:p>84729</text:p>
              </table:table-cell>
              <table:table-cell office:value-type="float" office:value="17102">
                <text:p>171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729">
                <text:p>84729</text:p>
              </table:table-cell>
              <table:table-cell office:value-type="float" office:value="17556">
                <text:p>175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6036">
                <text:p>86036</text:p>
              </table:table-cell>
              <table:table-cell office:value-type="float" office:value="17556">
                <text:p>175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6036">
                <text:p>86036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6618">
                <text:p>86618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6618">
                <text:p>86618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063">
                <text:p>87063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063">
                <text:p>87063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017">
                <text:p>88017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8017">
                <text:p>88017</text:p>
              </table:table-cell>
              <table:table-cell office:value-type="float" office:value="21427">
                <text:p>214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052">
                <text:p>89052</text:p>
              </table:table-cell>
              <table:table-cell office:value-type="float" office:value="21427">
                <text:p>214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052">
                <text:p>89052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084">
                <text:p>89084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084">
                <text:p>89084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52">
                <text:p>90152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152">
                <text:p>90152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745">
                <text:p>90745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45">
                <text:p>90745</text:p>
              </table:table-cell>
              <table:table-cell office:value-type="float" office:value="25874">
                <text:p>258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146">
                <text:p>91146</text:p>
              </table:table-cell>
              <table:table-cell office:value-type="float" office:value="25874">
                <text:p>258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46">
                <text:p>91146</text:p>
              </table:table-cell>
              <table:table-cell office:value-type="float" office:value="26704">
                <text:p>267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143">
                <text:p>92143</text:p>
              </table:table-cell>
              <table:table-cell office:value-type="float" office:value="26704">
                <text:p>26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143">
                <text:p>92143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552">
                <text:p>92552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552">
                <text:p>92552</text:p>
              </table:table-cell>
              <table:table-cell office:value-type="float" office:value="28994">
                <text:p>289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011">
                <text:p>93011</text:p>
              </table:table-cell>
              <table:table-cell office:value-type="float" office:value="28994">
                <text:p>289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011">
                <text:p>93011</text:p>
              </table:table-cell>
              <table:table-cell office:value-type="float" office:value="29977">
                <text:p>299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776">
                <text:p>93776</text:p>
              </table:table-cell>
              <table:table-cell office:value-type="float" office:value="29977">
                <text:p>299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3776">
                <text:p>93776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072">
                <text:p>94072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4072">
                <text:p>94072</text:p>
              </table:table-cell>
              <table:table-cell office:value-type="float" office:value="32226">
                <text:p>322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720">
                <text:p>94720</text:p>
              </table:table-cell>
              <table:table-cell office:value-type="float" office:value="32226">
                <text:p>322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720">
                <text:p>94720</text:p>
              </table:table-cell>
              <table:table-cell office:value-type="float" office:value="33435">
                <text:p>334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966">
                <text:p>94966</text:p>
              </table:table-cell>
              <table:table-cell office:value-type="float" office:value="33435">
                <text:p>334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966">
                <text:p>94966</text:p>
              </table:table-cell>
              <table:table-cell office:value-type="float" office:value="34438">
                <text:p>344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787">
                <text:p>95787</text:p>
              </table:table-cell>
              <table:table-cell office:value-type="float" office:value="34438">
                <text:p>344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787">
                <text:p>95787</text:p>
              </table:table-cell>
              <table:table-cell office:value-type="float" office:value="35578">
                <text:p>355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246">
                <text:p>96246</text:p>
              </table:table-cell>
              <table:table-cell office:value-type="float" office:value="35578">
                <text:p>355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246">
                <text:p>96246</text:p>
              </table:table-cell>
              <table:table-cell office:value-type="float" office:value="37010">
                <text:p>370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696">
                <text:p>95696</text:p>
              </table:table-cell>
              <table:table-cell office:value-type="float" office:value="37010">
                <text:p>370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696">
                <text:p>95696</text:p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851">
                <text:p>96851</text:p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851">
                <text:p>96851</text:p>
              </table:table-cell>
              <table:table-cell office:value-type="float" office:value="39327">
                <text:p>39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6359">
                <text:p>96359</text:p>
              </table:table-cell>
              <table:table-cell office:value-type="float" office:value="39327">
                <text:p>393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359">
                <text:p>96359</text:p>
              </table:table-cell>
              <table:table-cell office:value-type="float" office:value="40329">
                <text:p>403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477">
                <text:p>97477</text:p>
              </table:table-cell>
              <table:table-cell office:value-type="float" office:value="40329">
                <text:p>403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477">
                <text:p>97477</text:p>
              </table:table-cell>
              <table:table-cell office:value-type="float" office:value="41574">
                <text:p>415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485">
                <text:p>97485</text:p>
              </table:table-cell>
              <table:table-cell office:value-type="float" office:value="41574">
                <text:p>41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7485">
                <text:p>97485</text:p>
              </table:table-cell>
              <table:table-cell office:value-type="float" office:value="42825">
                <text:p>428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382">
                <text:p>97382</text:p>
              </table:table-cell>
              <table:table-cell office:value-type="float" office:value="42825">
                <text:p>428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382">
                <text:p>97382</text:p>
              </table:table-cell>
              <table:table-cell office:value-type="float" office:value="44008">
                <text:p>440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709">
                <text:p>97709</text:p>
              </table:table-cell>
              <table:table-cell office:value-type="float" office:value="44008">
                <text:p>440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709">
                <text:p>97709</text:p>
              </table:table-cell>
              <table:table-cell office:value-type="float" office:value="45225">
                <text:p>452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72">
                <text:p>97772</text:p>
              </table:table-cell>
              <table:table-cell office:value-type="float" office:value="45225">
                <text:p>452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772">
                <text:p>97772</text:p>
              </table:table-cell>
              <table:table-cell office:value-type="float" office:value="46470">
                <text:p>464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433">
                <text:p>97433</text:p>
              </table:table-cell>
              <table:table-cell office:value-type="float" office:value="46470">
                <text:p>464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7433">
                <text:p>97433</text:p>
              </table:table-cell>
              <table:table-cell office:value-type="float" office:value="47638">
                <text:p>476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228">
                <text:p>98228</text:p>
              </table:table-cell>
              <table:table-cell office:value-type="float" office:value="47638">
                <text:p>476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228">
                <text:p>98228</text:p>
              </table:table-cell>
              <table:table-cell office:value-type="float" office:value="48874">
                <text:p>488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7697">
                <text:p>97697</text:p>
              </table:table-cell>
              <table:table-cell office:value-type="float" office:value="48874">
                <text:p>488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697">
                <text:p>97697</text:p>
              </table:table-cell>
              <table:table-cell office:value-type="float" office:value="50083">
                <text:p>50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